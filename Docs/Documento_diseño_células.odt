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9"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2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1" style:parent-style-name="TD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2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3" style:parent-style-name="TD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2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5" style:parent-style-name="TD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2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7"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2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9" style:parent-style-name="Normal" style:family="paragraph">
      <style:paragraph-properties fo:text-align="justify" style:vertical-align="auto" fo:margin-top="0.0694in" fo:margin-bottom="0.0694in" fo:background-color="#FFFFFF"/>
      <style:text-properties fo:hyphenate="true"/>
    </style:style>
    <style:style style:name="T30" style:parent-style-name="Fuentedepárrafopredeter." style:family="text">
      <style:text-properties fo:font-style="italic" style:font-style-asian="italic" style:font-style-complex="italic"/>
    </style:style>
    <style:style style:name="T31" style:parent-style-name="Fuentedepárrafopredeter." style:family="text">
      <style:text-properties fo:font-style="italic" style:font-style-asian="italic" style:font-style-complex="italic"/>
    </style:style>
    <style:style style:name="P32" style:parent-style-name="Textbody" style:family="paragraph">
      <style:paragraph-properties fo:text-align="justify"/>
    </style:style>
    <style:style style:name="P33" style:parent-style-name="Standard" style:family="paragraph">
      <style:paragraph-properties fo:text-align="justify"/>
    </style:style>
    <style:style style:name="T34" style:parent-style-name="Fuentedepárrafopredeter." style:family="text">
      <style:text-properties fo:font-style="italic" style:font-style-asian="italic" style:font-style-complex="italic"/>
    </style:style>
    <style:style style:name="P35" style:parent-style-name="Standard" style:family="paragraph">
      <style:paragraph-properties fo:keep-with-next="always" fo:text-align="center"/>
    </style:style>
    <style:style style:name="T36" style:parent-style-name="Fuentedepárrafopredeter." style:family="text">
      <style:text-properties style:language-asian="es" style:country-asian="ES" style:language-complex="ar" style:country-complex="SA"/>
    </style:style>
    <style:style style:name="P37" style:parent-style-name="Descripción" style:family="paragraph">
      <style:paragraph-properties fo:text-align="center"/>
    </style:style>
    <style:style style:name="P38" style:parent-style-name="Descripción" style:family="paragraph">
      <style:paragraph-properties fo:text-align="center"/>
    </style:style>
    <style:style style:name="P39" style:parent-style-name="Textbody" style:family="paragraph">
      <style:paragraph-properties fo:text-align="justify"/>
    </style:style>
    <style:style style:name="T40" style:parent-style-name="Fuentedepárrafopredeter." style:family="text">
      <style:text-properties fo:font-style="italic" style:font-style-asian="italic"/>
    </style:style>
    <style:style style:name="T41" style:parent-style-name="Fuentedepárrafopredeter." style:family="text">
      <style:text-properties fo:font-style="italic" style:font-style-asian="italic"/>
    </style:style>
    <style:style style:name="T42" style:parent-style-name="Fuentedepárrafopredeter." style:family="text">
      <style:text-properties fo:font-style="italic" style:font-style-asian="italic"/>
    </style:style>
    <style:style style:name="T43" style:parent-style-name="Fuentedepárrafopredeter." style:family="text">
      <style:text-properties fo:font-style="italic" style:font-style-asian="italic"/>
    </style:style>
    <style:style style:name="P44" style:parent-style-name="Textbody" style:family="paragraph">
      <style:paragraph-properties fo:text-align="justify"/>
    </style:style>
    <style:style style:name="T45" style:parent-style-name="Fuentedepárrafopredeter." style:family="text">
      <style:text-properties fo:font-style="italic" style:font-style-asian="italic"/>
    </style:style>
    <style:style style:name="P46" style:parent-style-name="Textbody" style:family="paragraph">
      <style:paragraph-properties fo:text-align="justify"/>
    </style:style>
    <style:style style:name="T47" style:parent-style-name="Fuentedepárrafopredeter." style:family="text">
      <style:text-properties fo:font-weight="bold" style:font-weight-asian="bold"/>
    </style:style>
    <style:style style:name="T48" style:parent-style-name="Fuentedepárrafopredeter." style:family="text">
      <style:text-properties fo:font-style="italic" style:font-style-asian="italic"/>
    </style:style>
    <style:style style:name="P49" style:parent-style-name="Textbody" style:family="paragraph">
      <style:paragraph-properties fo:text-align="justify"/>
    </style:style>
    <style:style style:name="T50" style:parent-style-name="Fuentedepárrafopredeter." style:family="text">
      <style:text-properties fo:font-weight="bold" style:font-weight-asian="bold"/>
    </style:style>
    <style:style style:name="P51" style:parent-style-name="Textbody" style:family="paragraph">
      <style:paragraph-properties fo:text-align="justify"/>
    </style:style>
    <style:style style:name="T52" style:parent-style-name="Fuentedepárrafopredeter." style:family="text">
      <style:text-properties fo:font-weight="bold" style:font-weight-asian="bold"/>
    </style:style>
    <style:style style:name="P53" style:parent-style-name="Textbody" style:family="paragraph">
      <style:paragraph-properties fo:text-align="justify"/>
    </style:style>
    <style:style style:name="T54" style:parent-style-name="Fuentedepárrafopredeter." style:family="text">
      <style:text-properties fo:font-weight="bold" style:font-weight-asian="bold"/>
    </style:style>
    <style:style style:name="T55" style:parent-style-name="Fuentedepárrafopredeter." style:family="text">
      <style:text-properties fo:font-style="italic" style:font-style-asian="italic"/>
    </style:style>
    <style:style style:name="P56" style:parent-style-name="Textbody" style:family="paragraph">
      <style:paragraph-properties fo:text-align="justify"/>
    </style:style>
    <style:style style:name="T57" style:parent-style-name="Fuentedepárrafopredeter." style:family="text">
      <style:text-properties fo:font-weight="bold" style:font-weight-asian="bold"/>
    </style:style>
    <style:style style:name="T58" style:parent-style-name="Fuentedepárrafopredeter." style:family="text">
      <style:text-properties fo:font-style="italic" style:font-style-asian="italic"/>
    </style:style>
    <style:style style:name="P59" style:parent-style-name="Textbody" style:family="paragraph">
      <style:paragraph-properties fo:text-align="justify"/>
    </style:style>
    <style:style style:name="T60" style:parent-style-name="Fuentedepárrafopredeter." style:family="text">
      <style:text-properties fo:font-weight="bold" style:font-weight-asian="bold"/>
    </style:style>
    <style:style style:name="P61" style:parent-style-name="Textbody" style:family="paragraph">
      <style:paragraph-properties fo:text-align="justify"/>
    </style:style>
    <style:style style:name="T62" style:parent-style-name="Fuentedepárrafopredeter." style:family="text">
      <style:text-properties fo:font-weight="bold" style:font-weight-asian="bold"/>
    </style:style>
    <style:style style:name="P63" style:parent-style-name="Textbody" style:family="paragraph">
      <style:paragraph-properties fo:text-align="justify"/>
    </style:style>
    <style:style style:name="T64" style:parent-style-name="Fuentedepárrafopredeter." style:family="text">
      <style:text-properties fo:font-style="italic" style:font-style-asian="italic"/>
    </style:style>
    <style:style style:name="T65" style:parent-style-name="Fuentedepárrafopredeter." style:family="text">
      <style:text-properties fo:font-style="italic" style:font-style-asian="italic"/>
    </style:style>
    <style:style style:name="T66" style:parent-style-name="Fuentedepárrafopredeter." style:family="text">
      <style:text-properties fo:font-style="italic" style:font-style-asian="italic"/>
    </style:style>
    <style:style style:name="T67" style:parent-style-name="Fuentedepárrafopredeter." style:family="text">
      <style:text-properties fo:font-style="italic" style:font-style-asian="italic"/>
    </style:style>
    <style:style style:name="P68" style:parent-style-name="Textbody" style:family="paragraph">
      <style:paragraph-properties fo:keep-with-next="always" fo:text-align="center"/>
    </style:style>
    <style:style style:name="T69" style:parent-style-name="Fuentedepárrafopredeter." style:family="text">
      <style:text-properties style:language-asian="es" style:country-asian="ES" style:language-complex="ar" style:country-complex="SA"/>
    </style:style>
    <style:style style:name="P70" style:parent-style-name="Descripción" style:family="paragraph">
      <style:paragraph-properties fo:text-align="center"/>
    </style:style>
    <style:style style:name="P71" style:parent-style-name="Descripción" style:family="paragraph">
      <style:paragraph-properties fo:text-align="center"/>
    </style:style>
    <style:style style:name="P72" style:parent-style-name="Textbody" style:family="paragraph">
      <style:paragraph-properties fo:text-align="justify"/>
    </style:style>
    <style:style style:name="T73" style:parent-style-name="Fuentedepárrafopredeter." style:family="text">
      <style:text-properties fo:font-style="italic" style:font-style-asian="italic"/>
    </style:style>
    <style:style style:name="P74" style:parent-style-name="Textbody" style:family="paragraph">
      <style:paragraph-properties fo:text-align="justify"/>
    </style:style>
    <style:style style:name="T75" style:parent-style-name="Fuentedepárrafopredeter." style:family="text">
      <style:text-properties fo:font-style="italic" style:font-style-asian="italic"/>
    </style:style>
    <style:style style:name="P76" style:parent-style-name="Textbody" style:family="paragraph">
      <style:paragraph-properties fo:keep-with-next="always" fo:text-align="center"/>
    </style:style>
    <style:style style:name="T77" style:parent-style-name="Fuentedepárrafopredeter." style:family="text">
      <style:text-properties style:language-asian="es" style:country-asian="ES" style:language-complex="ar" style:country-complex="SA"/>
    </style:style>
    <style:style style:name="P78" style:parent-style-name="Descripción" style:family="paragraph">
      <style:paragraph-properties fo:text-align="center"/>
    </style:style>
    <style:style style:name="P79" style:parent-style-name="Descripción" style:family="paragraph">
      <style:paragraph-properties fo:text-align="center"/>
    </style:style>
    <style:style style:name="P80" style:parent-style-name="Textbody" style:family="paragraph">
      <style:paragraph-properties fo:text-align="justify"/>
    </style:style>
    <style:style style:name="P81" style:parent-style-name="Textbody" style:family="paragraph">
      <style:paragraph-properties fo:keep-with-next="always" fo:text-align="center"/>
    </style:style>
    <style:style style:name="T82" style:parent-style-name="Fuentedepárrafopredeter." style:family="text">
      <style:text-properties style:language-asian="es" style:country-asian="ES" style:language-complex="ar" style:country-complex="SA"/>
    </style:style>
    <style:style style:name="P83" style:parent-style-name="Descripción" style:family="paragraph">
      <style:paragraph-properties fo:text-align="center"/>
    </style:style>
    <style:style style:name="P84" style:parent-style-name="Descripción" style:family="paragraph">
      <style:paragraph-properties fo:text-align="center"/>
    </style:style>
    <style:style style:name="P85" style:parent-style-name="Textbody" style:family="paragraph">
      <style:paragraph-properties fo:text-align="justify"/>
    </style:style>
    <style:style style:name="P86" style:parent-style-name="Textbody" style:family="paragraph">
      <style:paragraph-properties fo:keep-with-next="always" fo:text-align="center"/>
    </style:style>
    <style:style style:name="T87" style:parent-style-name="Fuentedepárrafopredeter." style:family="text">
      <style:text-properties style:language-asian="es" style:country-asian="ES" style:language-complex="ar" style:country-complex="SA"/>
    </style:style>
    <style:style style:name="P88" style:parent-style-name="Descripción" style:family="paragraph">
      <style:paragraph-properties fo:text-align="center"/>
    </style:style>
    <style:style style:name="P89" style:parent-style-name="Descripción" style:family="paragraph">
      <style:paragraph-properties fo:text-align="center"/>
    </style:style>
    <style:style style:name="P90" style:parent-style-name="Textbody" style:family="paragraph">
      <style:paragraph-properties fo:text-align="justify"/>
    </style:style>
    <style:style style:name="T91" style:parent-style-name="Fuentedepárrafopredeter." style:family="text">
      <style:text-properties fo:font-style="italic" style:font-style-asian="italic"/>
    </style:style>
    <style:style style:name="T92" style:parent-style-name="Fuentedepárrafopredeter." style:family="text">
      <style:text-properties fo:font-style="italic" style:font-style-asian="italic"/>
    </style:style>
    <style:style style:name="P93" style:parent-style-name="Textbody" style:family="paragraph">
      <style:paragraph-properties fo:keep-with-next="always" fo:text-align="center"/>
    </style:style>
    <style:style style:name="T94" style:parent-style-name="Fuentedepárrafopredeter." style:family="text">
      <style:text-properties style:language-asian="es" style:country-asian="ES" style:language-complex="ar" style:country-complex="SA"/>
    </style:style>
    <style:style style:name="P95" style:parent-style-name="Descripción" style:family="paragraph">
      <style:paragraph-properties fo:text-align="center"/>
    </style:style>
    <style:style style:name="T96" style:parent-style-name="Fuentedepárrafopredeter." style:family="text">
      <style:text-properties fo:font-style="italic" style:font-style-asian="italic"/>
    </style:style>
    <style:style style:name="P97" style:parent-style-name="Textbody" style:family="paragraph">
      <style:paragraph-properties fo:text-align="justify"/>
    </style:style>
    <style:style style:name="P98" style:parent-style-name="Título2" style:family="paragraph">
      <style:paragraph-properties fo:text-align="justify"/>
    </style:style>
    <style:style style:name="P99" style:parent-style-name="Normal" style:family="paragraph">
      <style:paragraph-properties fo:text-align="justify" fo:background-color="#FFFFFF"/>
      <style:text-properties fo:hyphenate="true"/>
    </style:style>
    <style:style style:name="P100" style:parent-style-name="Normal" style:family="paragraph">
      <style:paragraph-properties fo:text-align="justify" fo:background-color="#FFFFFF"/>
      <style:text-properties fo:hyphenate="true"/>
    </style:style>
    <style:style style:name="P101" style:parent-style-name="Normal" style:family="paragraph">
      <style:paragraph-properties fo:text-align="justify" fo:background-color="#FFFFFF"/>
      <style:text-properties fo:hyphenate="true"/>
    </style:style>
    <style:style style:name="T102" style:parent-style-name="Fuentedepárrafopredeter." style:family="text">
      <style:text-properties style:language-asian="es" style:country-asian="ES" style:language-complex="ar" style:country-complex="SA"/>
    </style:style>
    <style:style style:name="P103" style:parent-style-name="Figura" style:family="paragraph">
      <style:paragraph-properties fo:keep-with-next="always" fo:text-align="center"/>
    </style:style>
    <style:style style:name="T104" style:parent-style-name="Fuentedepárrafopredeter." style:family="text">
      <style:text-properties style:language-asian="es" style:country-asian="ES" style:language-complex="ar" style:country-complex="SA"/>
    </style:style>
    <style:style style:name="P105" style:parent-style-name="Descripción" style:family="paragraph">
      <style:paragraph-properties fo:text-align="center"/>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T109" style:parent-style-name="Fuentedepárrafopredeter." style:family="text">
      <style:text-properties style:language-asian="es" style:country-asian="ES" style:language-complex="ar" style:country-complex="SA"/>
    </style:style>
    <style:style style:name="P110" style:parent-style-name="Figura" style:family="paragraph">
      <style:paragraph-properties fo:keep-with-next="always" fo:text-align="center"/>
    </style:style>
    <style:style style:name="T111" style:parent-style-name="Fuentedepárrafopredeter." style:family="text">
      <style:text-properties style:language-asian="es" style:country-asian="ES" style:language-complex="ar" style:country-complex="SA"/>
    </style:style>
    <style:style style:name="P112" style:parent-style-name="Descripción" style:family="paragraph">
      <style:paragraph-properties fo:text-align="center"/>
    </style:style>
    <style:style style:name="T113" style:parent-style-name="Fuentedepárrafopredeter." style:family="text">
      <style:text-properties fo:font-weight="bold" style:font-weight-asian="bold" style:font-weight-complex="bold"/>
    </style:style>
    <style:style style:name="T114" style:parent-style-name="Fuentedepárrafopredeter." style:family="text">
      <style:text-properties fo:font-style="italic" style:font-style-asian="italic" style:font-style-complex="italic"/>
    </style:style>
    <style:style style:name="T115" style:parent-style-name="Fuentedepárrafopredeter." style:family="text">
      <style:text-properties fo:font-style="italic" style:font-style-asian="italic"/>
    </style:style>
    <style:style style:name="P116" style:parent-style-name="Textbody" style:family="paragraph">
      <style:paragraph-properties fo:text-align="justify" fo:margin-left="0.5in">
        <style:tab-stops/>
      </style:paragraph-properties>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fo:margin-left="0.5in">
        <style:tab-stops/>
      </style:paragraph-properties>
    </style:style>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fo:font-style="italic" style:font-style-asian="italic" style:font-style-complex="italic"/>
    </style:style>
    <style:style style:name="P122" style:parent-style-name="Textbody" style:family="paragraph">
      <style:paragraph-properties fo:text-align="justify"/>
    </style:style>
    <style:style style:name="T123" style:parent-style-name="Fuentedepárrafopredeter." style:family="text">
      <style:text-properties fo:font-weight="bold" style:font-weight-asian="bold" style:font-weight-complex="bold"/>
    </style:style>
    <style:style style:name="T124" style:parent-style-name="Fuentedepárrafopredeter." style:family="text">
      <style:text-properties fo:font-style="italic" style:font-style-asian="italic" style:font-style-complex="italic"/>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T127" style:parent-style-name="Fuentedepárrafopredeter." style:family="text">
      <style:text-properties fo:font-style="italic" style:font-style-asian="italic" style:font-style-complex="italic"/>
    </style:style>
    <style:style style:name="T128" style:parent-style-name="Fuentedepárrafopredeter." style:family="text">
      <style:text-properties fo:font-style="italic" style:font-style-asian="italic" style:font-style-complex="italic"/>
    </style:style>
    <style:style style:name="P129" style:parent-style-name="Textbody" style:family="paragraph">
      <style:paragraph-properties fo:text-align="justify"/>
    </style:style>
    <style:style style:name="T130" style:parent-style-name="Fuentedepárrafopredeter." style:family="text">
      <style:text-properties fo:font-weight="bold" style:font-weight-asian="bold" style:font-weight-complex="bold"/>
    </style:style>
    <style:style style:name="P131" style:parent-style-name="Textbody" style:family="paragraph">
      <style:paragraph-properties fo:text-align="justify"/>
    </style:style>
    <style:style style:name="T132" style:parent-style-name="Fuentedepárrafopredeter." style:family="text">
      <style:text-properties fo:font-weight="bold" style:font-weight-asian="bold" style:font-weight-complex="bold"/>
    </style:style>
    <style:style style:name="T133" style:parent-style-name="Fuentedepárrafopredeter." style:family="text">
      <style:text-properties style:font-name="Consolas" fo:color="#0A3069" fo:font-size="9pt" style:font-size-asian="9pt" style:font-size-complex="9pt" fo:background-color="#FFFFFF"/>
    </style:style>
    <style:style style:name="P134" style:parent-style-name="Textbody" style:family="paragraph">
      <style:paragraph-properties fo:text-align="justify"/>
    </style:style>
    <style:style style:name="T135" style:parent-style-name="Fuentedepárrafopredeter." style:family="text">
      <style:text-properties fo:font-weight="bold" style:font-weight-asian="bold" style:font-weight-complex="bold"/>
    </style:style>
    <style:style style:name="P136" style:parent-style-name="Textbody" style:family="paragraph">
      <style:paragraph-properties fo:text-align="justify"/>
    </style:style>
    <style:style style:name="T137" style:parent-style-name="Fuentedepárrafopredeter." style:family="text">
      <style:text-properties fo:font-weight="bold" style:font-weight-asian="bold" style:font-weight-complex="bold"/>
    </style:style>
    <style:style style:name="T138" style:parent-style-name="Fuentedepárrafopredeter." style:family="text">
      <style:text-properties fo:font-style="italic" style:font-style-asian="italic" style:font-style-complex="italic"/>
    </style:style>
    <style:style style:name="P139" style:parent-style-name="Textbody" style:family="paragraph">
      <style:paragraph-properties fo:text-align="justify"/>
    </style:style>
    <style:style style:name="T140" style:parent-style-name="Fuentedepárrafopredeter." style:family="text">
      <style:text-properties fo:font-weight="bold" style:font-weight-asian="bold" style:font-weight-complex="bold"/>
    </style:style>
    <style:style style:name="T141" style:parent-style-name="Fuentedepárrafopredeter." style:family="text">
      <style:text-properties fo:font-style="italic" style:font-style-asian="italic" style:font-style-complex="italic"/>
    </style:style>
    <style:style style:name="T142" style:parent-style-name="Fuentedepárrafopredeter." style:family="text">
      <style:text-properties style:font-name="Consolas" fo:color="#0A3069" fo:font-size="9pt" style:font-size-asian="9pt" style:font-size-complex="9pt" fo:background-color="#FFFFFF"/>
    </style:style>
    <style:style style:name="P143" style:parent-style-name="Textbody" style:family="paragraph">
      <style:paragraph-properties fo:text-align="justify"/>
    </style:style>
    <style:style style:name="T144" style:parent-style-name="Fuentedepárrafopredeter." style:family="text">
      <style:text-properties fo:font-weight="bold" style:font-weight-asian="bold" style:font-weight-complex="bold"/>
    </style:style>
    <style:style style:name="T145" style:parent-style-name="Fuentedepárrafopredeter." style:family="text">
      <style:text-properties fo:font-style="italic" style:font-style-asian="italic" style:font-style-complex="italic"/>
    </style:style>
    <style:style style:name="T146" style:parent-style-name="Fuentedepárrafopredeter." style:family="text">
      <style:text-properties fo:font-style="italic" style:font-style-asian="italic"/>
    </style:style>
    <style:style style:name="P147" style:parent-style-name="Textbody" style:family="paragraph">
      <style:paragraph-properties fo:text-align="justify" fo:margin-left="0.5in">
        <style:tab-stops/>
      </style:paragraph-properties>
    </style:style>
    <style:style style:name="T148" style:parent-style-name="Fuentedepárrafopredeter." style:family="text">
      <style:text-properties style:language-asian="es" style:country-asian="ES" style:language-complex="ar" style:country-complex="SA"/>
    </style:style>
    <style:style style:name="P149" style:parent-style-name="Figura" style:family="paragraph">
      <style:paragraph-properties fo:keep-with-next="always" fo:text-align="center"/>
    </style:style>
    <style:style style:name="T150" style:parent-style-name="Fuentedepárrafopredeter." style:family="text">
      <style:text-properties style:language-asian="es" style:country-asian="ES" style:language-complex="ar" style:country-complex="SA"/>
    </style:style>
    <style:style style:name="P151" style:parent-style-name="Descripción" style:family="paragraph">
      <style:paragraph-properties fo:text-align="center"/>
    </style:style>
    <style:style style:name="P152" style:parent-style-name="Figura" style:family="paragraph">
      <style:paragraph-properties fo:text-align="center"/>
    </style:style>
    <style:style style:name="P153" style:parent-style-name="Textbody" style:family="paragraph">
      <style:paragraph-properties fo:text-align="justify" fo:margin-left="0.5in">
        <style:tab-stops/>
      </style:paragraph-properties>
    </style:style>
    <style:style style:name="P154" style:parent-style-name="Textbody" style:family="paragraph">
      <style:paragraph-properties fo:text-align="justify" fo:margin-left="0.5in">
        <style:tab-stops/>
      </style:paragraph-properties>
    </style:style>
    <style:style style:name="P155" style:parent-style-name="Textbody" style:family="paragraph">
      <style:paragraph-properties fo:text-align="justify" fo:margin-left="0.5in">
        <style:tab-stops/>
      </style:paragraph-properties>
    </style:style>
    <style:style style:name="P156" style:parent-style-name="Textbody" style:family="paragraph">
      <style:paragraph-properties fo:text-align="justify" fo:margin-left="0.5in">
        <style:tab-stops/>
      </style:paragraph-properties>
    </style:style>
    <style:style style:name="P157" style:parent-style-name="Textbody" style:family="paragraph">
      <style:paragraph-properties fo:text-align="justify" fo:margin-left="0.5in">
        <style:tab-stops/>
      </style:paragraph-properties>
    </style:style>
    <style:style style:name="P158" style:parent-style-name="Textbody" style:family="paragraph">
      <style:paragraph-properties fo:text-align="justify" fo:margin-left="0.5in">
        <style:tab-stops/>
      </style:paragraph-properties>
    </style:style>
    <style:style style:name="P159" style:parent-style-name="Textbody" style:family="paragraph">
      <style:paragraph-properties fo:text-align="justify" fo:margin-left="0.5in">
        <style:tab-stops/>
      </style:paragraph-properties>
    </style:style>
    <style:style style:name="P160" style:parent-style-name="Textbody" style:family="paragraph">
      <style:paragraph-properties fo:text-align="justify" fo:margin-left="0.5in">
        <style:tab-stops/>
      </style:paragraph-properties>
    </style:style>
    <style:style style:name="P161" style:parent-style-name="Textbody" style:family="paragraph">
      <style:paragraph-properties fo:text-align="justify" fo:margin-left="0.5in">
        <style:tab-stops/>
      </style:paragraph-properties>
    </style:style>
    <style:style style:name="P162" style:parent-style-name="Textbody" style:family="paragraph">
      <style:paragraph-properties fo:text-align="justify" fo:margin-left="0.5in">
        <style:tab-stops/>
      </style:paragraph-properties>
    </style:style>
    <style:style style:name="P163" style:parent-style-name="Textbody" style:family="paragraph">
      <style:paragraph-properties fo:text-align="justify" fo:margin-left="0.5in">
        <style:tab-stops/>
      </style:paragraph-properties>
    </style:style>
    <style:style style:name="P164" style:parent-style-name="Textbody" style:family="paragraph">
      <style:paragraph-properties fo:text-align="justify" fo:margin-left="0.5in">
        <style:tab-stops/>
      </style:paragraph-properties>
    </style:style>
    <style:style style:name="P165" style:parent-style-name="Textbody" style:family="paragraph">
      <style:paragraph-properties fo:text-align="justify" fo:margin-left="0.5in">
        <style:tab-stops/>
      </style:paragraph-properties>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T169" style:parent-style-name="Fuentedepárrafopredeter." style:family="text">
      <style:text-properties fo:font-style="italic" style:font-style-asian="italic" style:font-style-complex="italic"/>
    </style:style>
    <style:style style:name="T170" style:parent-style-name="Fuentedepárrafopredeter." style:family="text">
      <style:text-properties fo:font-style="italic" style:font-style-asian="italic" style:font-style-complex="italic"/>
    </style:style>
    <style:style style:name="P171" style:parent-style-name="Textbody" style:family="paragraph">
      <style:paragraph-properties fo:text-align="justify"/>
    </style:style>
    <style:style style:name="T172" style:parent-style-name="Fuentedepárrafopredeter." style:family="text">
      <style:text-properties fo:font-style="italic" style:font-style-asian="italic"/>
    </style:style>
    <style:style style:name="P173" style:parent-style-name="Textbody" style:family="paragraph">
      <style:paragraph-properties fo:text-align="justify"/>
    </style:style>
    <style:style style:name="T174" style:parent-style-name="Fuentedepárrafopredeter." style:family="text">
      <style:text-properties fo:font-weight="bold" style:font-weight-asian="bold" style:font-weight-complex="bold"/>
    </style:style>
    <style:style style:name="T175" style:parent-style-name="Fuentedepárrafopredeter." style:family="text">
      <style:text-properties fo:font-style="italic" style:font-style-asian="italic" style:font-style-complex="italic"/>
    </style:style>
    <style:style style:name="P176" style:parent-style-name="Textbody" style:family="paragraph">
      <style:paragraph-properties fo:text-align="justify"/>
    </style:style>
    <style:style style:name="T177" style:parent-style-name="Fuentedepárrafopredeter." style:family="text">
      <style:text-properties fo:font-weight="bold" style:font-weight-asian="bold" style:font-weight-complex="bold"/>
    </style:style>
    <style:style style:name="P178" style:parent-style-name="Textbody" style:family="paragraph">
      <style:paragraph-properties fo:text-align="justify"/>
    </style:style>
    <style:style style:name="T179" style:parent-style-name="Fuentedepárrafopredeter." style:family="text">
      <style:text-properties fo:font-weight="bold" style:font-weight-asian="bold" style:font-weight-complex="bold"/>
    </style:style>
    <style:style style:name="T180" style:parent-style-name="Fuentedepárrafopredeter." style:family="text">
      <style:text-properties fo:font-style="italic" style:font-style-asian="italic" style:font-style-complex="italic"/>
    </style:style>
    <style:style style:name="P181" style:parent-style-name="Textbody" style:family="paragraph">
      <style:paragraph-properties fo:text-align="justify" fo:margin-left="0.5in">
        <style:tab-stops/>
      </style:paragraph-properties>
    </style:style>
    <style:style style:name="T182" style:parent-style-name="Fuentedepárrafopredeter." style:family="text">
      <style:text-properties fo:font-style="italic" style:font-style-asian="italic" style:font-style-complex="italic"/>
    </style:style>
    <style:style style:name="T183" style:parent-style-name="Fuentedepárrafopredeter." style:family="text">
      <style:text-properties fo:font-style="italic" style:font-style-asian="italic" style:font-style-complex="italic"/>
    </style:style>
    <style:style style:name="T184" style:parent-style-name="Fuentedepárrafopredeter." style:family="text">
      <style:text-properties fo:font-style="italic" style:font-style-asian="italic" style:font-style-complex="italic"/>
    </style:style>
    <style:style style:name="T185" style:parent-style-name="Fuentedepárrafopredeter." style:family="text">
      <style:text-properties fo:font-style="italic" style:font-style-asian="italic" style:font-style-complex="italic"/>
    </style:style>
    <style:style style:name="P186" style:parent-style-name="Textbody" style:family="paragraph">
      <style:paragraph-properties fo:text-align="justify" fo:margin-left="0.5in">
        <style:tab-stops/>
      </style:paragraph-properties>
    </style:style>
    <style:style style:name="T187" style:parent-style-name="Fuentedepárrafopredeter." style:family="text">
      <style:text-properties style:language-asian="es" style:country-asian="ES" style:language-complex="ar" style:country-complex="SA"/>
    </style:style>
    <style:style style:name="P188" style:parent-style-name="Figura" style:family="paragraph">
      <style:paragraph-properties fo:keep-with-next="always" fo:text-align="center"/>
    </style:style>
    <style:style style:name="T189" style:parent-style-name="Fuentedepárrafopredeter." style:family="text">
      <style:text-properties style:language-asian="es" style:country-asian="ES" style:language-complex="ar" style:country-complex="SA"/>
    </style:style>
    <style:style style:name="P190" style:parent-style-name="Descripción" style:family="paragraph">
      <style:paragraph-properties fo:text-align="center"/>
    </style:style>
    <style:style style:name="P191" style:parent-style-name="Figura" style:family="paragraph">
      <style:paragraph-properties fo:text-align="center"/>
    </style:style>
    <style:style style:name="P192" style:parent-style-name="Textbody" style:family="paragraph">
      <style:paragraph-properties fo:text-align="justify" fo:margin-left="0.5in">
        <style:tab-stops/>
      </style:paragraph-properties>
    </style:style>
    <style:style style:name="P193" style:parent-style-name="Textbody" style:family="paragraph">
      <style:paragraph-properties fo:text-align="justify" fo:margin-left="0.5in">
        <style:tab-stops/>
      </style:paragraph-properties>
    </style:style>
    <style:style style:name="P194" style:parent-style-name="Textbody" style:family="paragraph">
      <style:paragraph-properties fo:text-align="justify" fo:margin-left="0.5in">
        <style:tab-stops/>
      </style:paragraph-properties>
    </style:style>
    <style:style style:name="P195" style:parent-style-name="Textbody" style:family="paragraph">
      <style:paragraph-properties fo:text-align="justify" fo:margin-left="0.5in">
        <style:tab-stops/>
      </style:paragraph-properties>
    </style:style>
    <style:style style:name="P196" style:parent-style-name="Textbody" style:family="paragraph">
      <style:paragraph-properties fo:text-align="justify" fo:margin-left="0.5in">
        <style:tab-stops/>
      </style:paragraph-properties>
    </style:style>
    <style:style style:name="P197" style:parent-style-name="Textbody" style:family="paragraph">
      <style:paragraph-properties fo:text-align="justify" fo:margin-left="0.5in">
        <style:tab-stops/>
      </style:paragraph-properties>
    </style:style>
    <style:style style:name="P198" style:parent-style-name="Textbody" style:family="paragraph">
      <style:paragraph-properties fo:text-align="justify" fo:margin-left="0.5in">
        <style:tab-stops/>
      </style:paragraph-properties>
    </style:style>
    <style:style style:name="P199" style:parent-style-name="Textbody" style:family="paragraph">
      <style:paragraph-properties fo:text-align="justify" fo:margin-left="0.5in">
        <style:tab-stops/>
      </style:paragraph-properties>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T203" style:parent-style-name="Fuentedepárrafopredeter." style:family="text">
      <style:text-properties fo:font-weight="bold" style:font-weight-asian="bold" style:font-weight-complex="bold"/>
    </style:style>
    <style:style style:name="T204" style:parent-style-name="Fuentedepárrafopredeter." style:family="text">
      <style:text-properties fo:font-style="italic" style:font-style-asian="italic" style:font-style-complex="italic"/>
    </style:style>
    <style:style style:name="P205" style:parent-style-name="Textbody" style:family="paragraph">
      <style:paragraph-properties fo:text-align="justify"/>
    </style:style>
    <style:style style:name="T206" style:parent-style-name="Fuentedepárrafopredeter." style:family="text">
      <style:text-properties fo:font-weight="bold" style:font-weight-asian="bold" style:font-weight-complex="bold"/>
    </style:style>
    <style:style style:name="T207" style:parent-style-name="Fuentedepárrafopredeter." style:family="text">
      <style:text-properties fo:font-style="italic" style:font-style-asian="italic" style:font-style-complex="italic"/>
    </style:style>
    <style:style style:name="T208" style:parent-style-name="Fuentedepárrafopredeter." style:family="text">
      <style:text-properties fo:font-style="italic" style:font-style-asian="italic" style:font-style-complex="italic"/>
    </style:style>
    <style:style style:name="P209" style:parent-style-name="Textbody" style:family="paragraph">
      <style:paragraph-properties fo:text-align="center"/>
    </style:style>
    <style:style style:name="T210" style:parent-style-name="Fuentedepárrafopredeter." style:family="text">
      <style:text-properties fo:font-style="italic" style:font-style-asian="italic"/>
    </style:style>
    <style:style style:name="T211" style:parent-style-name="Fuentedepárrafopredeter." style:family="text">
      <style:text-properties fo:font-style="italic" style:font-style-asian="italic"/>
    </style:style>
    <style:style style:name="P212" style:parent-style-name="Textbody" style:family="paragraph"/>
    <style:style style:name="T213" style:parent-style-name="Fuentedepárrafopredeter." style:family="text">
      <style:text-properties fo:font-style="italic" style:font-style-asian="italic"/>
    </style:style>
    <style:style style:name="P214" style:parent-style-name="Textbody" style:family="paragraph"/>
    <style:style style:name="T215" style:parent-style-name="Fuentedepárrafopredeter." style:family="text">
      <style:text-properties fo:font-style="italic" style:font-style-asian="italic"/>
    </style:style>
    <style:style style:name="P216" style:parent-style-name="Textbody" style:family="paragraph"/>
    <style:style style:name="T217" style:parent-style-name="Fuentedepárrafopredeter." style:family="text">
      <style:text-properties fo:font-style="italic" style:font-style-asian="italic"/>
    </style:style>
    <style:style style:name="T218" style:parent-style-name="Fuentedepárrafopredeter." style:family="text">
      <style:text-properties fo:font-style="italic" style:font-style-asian="italic"/>
    </style:style>
    <style:style style:name="T219" style:parent-style-name="Fuentedepárrafopredeter." style:family="text">
      <style:text-properties fo:font-style="italic" style:font-style-asian="italic"/>
    </style:style>
    <style:style style:name="T220" style:parent-style-name="Fuentedepárrafopredeter." style:family="text">
      <style:text-properties fo:font-style="italic" style:font-style-asian="italic"/>
    </style:style>
    <style:style style:name="T221" style:parent-style-name="Fuentedepárrafopredeter." style:family="text">
      <style:text-properties fo:font-style="italic" style:font-style-asian="italic"/>
    </style:style>
    <style:style style:name="P222" style:parent-style-name="Textbody" style:family="paragraph"/>
    <style:style style:name="P223" style:parent-style-name="Textbody" style:family="paragraph"/>
    <style:style style:name="T224" style:parent-style-name="Fuentedepárrafopredeter." style:family="text">
      <style:text-properties fo:font-style="italic" style:font-style-asian="italic"/>
    </style:style>
    <style:style style:name="P225" style:parent-style-name="Textbody" style:family="paragraph"/>
    <style:style style:name="T226" style:parent-style-name="Fuentedepárrafopredeter." style:family="text">
      <style:text-properties fo:font-style="italic" style:font-style-asian="italic"/>
    </style:style>
    <style:style style:name="T227" style:parent-style-name="Fuentedepárrafopredeter." style:family="text">
      <style:text-properties fo:font-style="italic" style:font-style-asian="italic"/>
    </style:style>
    <style:style style:name="T228" style:parent-style-name="Fuentedepárrafopredeter." style:family="text">
      <style:text-properties fo:font-style="italic" style:font-style-asian="italic"/>
    </style:style>
    <style:style style:name="P229" style:parent-style-name="Textbody" style:family="paragraph">
      <style:paragraph-properties fo:keep-with-next="always" fo:text-align="center"/>
    </style:style>
    <style:style style:name="T230" style:parent-style-name="Fuentedepárrafopredeter." style:family="text">
      <style:text-properties style:language-asian="es" style:country-asian="ES" style:language-complex="ar" style:country-complex="SA"/>
    </style:style>
    <style:style style:name="P231" style:parent-style-name="Descripción" style:family="paragraph">
      <style:paragraph-properties fo:text-align="center"/>
    </style:style>
    <style:style style:name="P232" style:parent-style-name="Descripción" style:family="paragraph">
      <style:text-properties fo:font-style="normal" style:font-style-asian="normal"/>
    </style:style>
    <style:style style:family="graphic" style:name="a12" style:parent-style-name="Graphics">
      <style:graphic-properties fo:border="0.01042in none" fo:background-color="transparent" fo:clip="rect(0in, 0.4992in, 0.37267in, 0in)"/>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Toc131018586" office:target-frame-name="_top" xlink:show="replace"><text:span text:style-name="Hipervínculo">1</text:span><text:span text:style-name="T10"><text:tab/></text:span><text:span text:style-name="Hipervínculo">Introducción</text:span><text:tab/>2</text:a></text:p>
          <text:p text:style-name="P11"><text:a xlink:href="#_Toc131018587" office:target-frame-name="_top" xlink:show="replace"><text:span text:style-name="Hipervínculo">1.1</text:span><text:span text:style-name="T12"><text:tab/></text:span><text:span text:style-name="Hipervínculo">Descripción del funcionamiento de la aplicación</text:span><text:tab/>2</text:a></text:p>
          <text:p text:style-name="P13"><text:a xlink:href="#_Toc131018588" office:target-frame-name="_top" xlink:show="replace"><text:span text:style-name="Hipervínculo">1.2</text:span><text:span text:style-name="T14"><text:tab/></text:span><text:span text:style-name="Hipervínculo">Descripción del funcionamiento de los test</text:span><text:tab/>2</text:a></text:p>
          <text:p text:style-name="P15"><text:a xlink:href="#_Toc131018589" office:target-frame-name="_top" xlink:show="replace"><text:span text:style-name="Hipervínculo">2</text:span><text:span text:style-name="T16"><text:tab/></text:span><text:span text:style-name="Hipervínculo">Diseño de la solución</text:span><text:tab/>5</text:a></text:p>
          <text:p text:style-name="P17"><text:a xlink:href="#_Toc131018590" office:target-frame-name="_top" xlink:show="replace"><text:span text:style-name="Hipervínculo">2.1</text:span><text:span text:style-name="T18"><text:tab/></text:span><text:span text:style-name="Hipervínculo">Diagrama Estático de Clases</text:span><text:tab/>5</text:a></text:p>
          <text:p text:style-name="P19"><text:a xlink:href="#_Toc131018591" office:target-frame-name="_top" xlink:show="replace"><text:span text:style-name="Hipervínculo">2.2</text:span><text:span text:style-name="T20"><text:tab/></text:span><text:span text:style-name="Hipervínculo">Descripción de las clases</text:span><text:tab/>5</text:a></text:p>
          <text:p text:style-name="P21"><text:a xlink:href="#_Toc131018592" office:target-frame-name="_top" xlink:show="replace"><text:span text:style-name="Hipervínculo">2.2.1</text:span><text:span text:style-name="T22"><text:tab/></text:span><text:span text:style-name="Hipervínculo">CellCountApp</text:span><text:tab/>5</text:a></text:p>
          <text:p text:style-name="P23"><text:a xlink:href="#_Toc131018593" office:target-frame-name="_top" xlink:show="replace"><text:span text:style-name="Hipervínculo">2.2.2</text:span><text:span text:style-name="T24"><text:tab/></text:span><text:span text:style-name="Hipervínculo">ImageCell</text:span><text:tab/>7</text:a></text:p>
          <text:p text:style-name="P25"><text:a xlink:href="#_Toc131018594" office:target-frame-name="_top" xlink:show="replace"><text:span text:style-name="Hipervínculo">2.2.3</text:span><text:span text:style-name="T26"><text:tab/></text:span><text:span text:style-name="Hipervínculo">trainCell</text:span><text:tab/>8</text:a></text:p>
          <text:p text:style-name="P27"><text:a xlink:href="#_Toc131018595" office:target-frame-name="_top" xlink:show="replace"><text:span text:style-name="Hipervínculo">2.3</text:span><text:span text:style-name="T28"><text:tab/></text:span><text:span text:style-name="Hipervínculo">Diagrama de Secuencia</text:span><text:tab/>9</text:a></text:p>
        </text:index-body>
      </text:table-of-content>
      <text:p text:style-name="Textbody"/>
      <text:h text:style-name="Título1" text:outline-level="1"><text:bookmark-start text:name="__RefHeading___Toc416_3441010062"/><text:bookmark-start text:name="_Toc131018586"/><text:soft-page-break/>Introducción<text:bookmark-end text:name="__RefHeading___Toc416_3441010062"/><text:bookmark-end text:name="_Toc131018586"/></text:h>
      <text:p text:style-name="P29">El presente documento trata sobre el diseño y configuración de la aplicación<text:s/><text:span text:style-name="T30">CountCellApp</text:span>, proyecto llevado a cabo por<text:s/><text:span text:style-name="T31">VisionAll</text:span>. En él se va a incluir una descripción del funcionamiento del proyecto, los tests unitarios implementados para asegurar su eficicacia y la inclusión y explicación de los siguientes diagramas: diagrama UML Estático de Clases, diagrama UML de Secuencia y diferentes diagramas UML de Actividad.<text:s/></text:p>
      <text:p text:style-name="P32">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text:bookmark-start text:name="_Toc131018587"/>Descripción del funcionamiento<text:s/><text:bookmark-end text:name="__RefHeading___Toc418_3441010062"/>de la aplicación<text:bookmark-end text:name="_Toc131018587"/></text:h>
      <text:p text:style-name="P33">Para esta entrega, se ha desarrollado una primera versión básica de la aplicación CellCountApp. Esta app es capaz de cargar la imagen seleccionada por el usuario mediante la interfaz gráfica desarrollada y procesar la detección de las células. Para ello, utiliza la red neuronal de detección YOLOv5, la cual ha sido preentrenada previamente para el problema. Esta red devuelve listas con las coordenadas correspondientes para delimitar los límites de cada célula dentro de la imagen. Seguidamente, estas listas son procesadas para incorporar los<text:s/><text:span text:style-name="T34">bounding box</text:span><text:s/>en la imagen y finalmente, la imagen junto con la detección, conteo de células y la confianza de la predicción es mostrada al usuario como se ve en la siguiente imagen:<text:s/></text:p>
      <text:p text:style-name="P35"><text:span text:style-name="T36"><draw:frame draw:style-name="a1" draw:name="Imagen 4" text:anchor-type="as-char" svg:x="0in" svg:y="0in" svg:width="3.83135in" svg:height="2.66978in" style:rel-width="scale" style:rel-height="scale"><draw:image xlink:href="media/image2.png" xlink:type="simple" xlink:show="embed" xlink:actuate="onLoad"/><svg:title/><svg:desc/></draw:frame></text:span></text:p>
      <text:p text:style-name="P37">Figura 1.- Imagen de la interfaz CellCountApp</text:p>
      <text:p text:style-name="P38"/>
      <text:h text:style-name="Título2" text:outline-level="2"><text:bookmark-start text:name="__RefHeading___Toc420_3441010062"/><text:bookmark-start text:name="_Toc131018588"/>Descripción del funcionamiento de los test<text:bookmark-end text:name="__RefHeading___Toc420_3441010062"/><text:bookmark-end text:name="_Toc131018588"/></text:h>
      <text:p text:style-name="P39">Para poder comprobar que el funcionamiento de los algoritmos es el esperado, se han desarrollado una serie de test que comprueban que los resultados son los correctos. En la carpeta de<text:s/><text:span text:style-name="T40">Tests</text:span>, se encuentran la implementación en<text:s/><text:span text:style-name="T41">tests.py</text:span>, que pueden probarse ejecutando el código<text:s/><text:span text:style-name="T42">run_tests.py</text:span>. Estos se han desarrollado sobre la clase<text:s/><text:span text:style-name="T43">ImageCell</text:span><text:s/>que será descrita posteriormente. Esta clase es la encargada de cargar el modelo entrenado de YOLOv5 y ejecutar la predicción sobre una imagen cargada.<text:s/></text:p>
      <text:p text:style-name="P44">Los test desarrollados contenidos en la clase<text:s/><text:span text:style-name="T45">testCells</text:span><text:s/>son los siguientes:<text:s/></text:p>
      <text:list text:style-name="LFO22" text:continue-numbering="true">
        <text:list-item>
          <text:p text:style-name="P46"><text:span text:style-name="T47">test_loadImagen(self):</text:span><text:s/>comprueba que el tipo de la imagen a cargar es correcto y no es<text:s/><text:span text:style-name="T48">None</text:span>.<text:s/></text:p>
        </text:list-item>
        <text:list-item>
          <text:p text:style-name="P49"><text:span text:style-name="T50">test_prepareImage(self):</text:span><text:s/>tiene en cuenta el tipo del resultado tras procesar la imagen para poder realizar la predicción es el correcto. <text:s/></text:p>
        </text:list-item>
        <text:list-item>
          <text:p text:style-name="P51"><text:span text:style-name="T52">test_loadModel(self):</text:span><text:s/>sirve para comprobar que el modelo es cargado correctamente y existe.<text:s/></text:p>
        </text:list-item>
        <text:list-item>
          <text:p text:style-name="P53"><text:span text:style-name="T54">test_BoundingBox(self):</text:span><text:s/>se centra en que se hayan detectado<text:s/><text:span text:style-name="T55">bounding boxes</text:span><text:s/>tras la salida de la predicción de las células. <text:s/></text:p>
        </text:list-item>
        <text:list-item>
          <text:p text:style-name="P56"><text:span text:style-name="T57">test_drawBoundingBox(self):<text:s/></text:span>comprueba que se han procesado los<text:s/><text:span text:style-name="T58">bounding boxes</text:span><text:s/>en una imagen de tipo correcto. <text:s text:c="2"/></text:p>
        </text:list-item>
        <text:list-item>
          <text:p text:style-name="P59"><text:span text:style-name="T60">test_countCells(self):</text:span><text:s/>destaca si el número de células detectadas es menor que 0.<text:s/></text:p>
        </text:list-item>
        <text:list-item>
          <text:p text:style-name="P61"><text:span text:style-name="T62">test_totalCells(self):</text:span><text:s/>cuenta la cantidad de células detectadas y comprueba el total obtenido con el esperado.<text:s/></text:p>
        </text:list-item>
      </text:list>
      <text:p text:style-name="P63">Además de esto, se tiene la función<text:s/><text:span text:style-name="T64">setUp()</text:span><text:s/>que carga una instancia de la clase<text:s/><text:span text:style-name="T65">ImageCell</text:span><text:s/>para poder procesar los test y elegir la imagen y el modelo a utilizar. Si se selecciona la imagen<text:s/><text:span text:style-name="T66">BloodImage_00225.jpg</text:span><text:s/>y el modelo<text:s/><text:span text:style-name="T67">yolov5s_cells1.onnx</text:span>, se obtiene la siguiente salida:<text:s/></text:p>
      <text:p text:style-name="P68"><text:span text:style-name="T69"><draw:frame draw:style-name="a2" draw:name="Imagen 5" text:anchor-type="as-char" svg:x="0in" svg:y="0in" svg:width="4.60808in" svg:height="1.62272in" style:rel-width="scale" style:rel-height="scale"><draw:image xlink:href="media/image3.png" xlink:type="simple" xlink:show="embed" xlink:actuate="onLoad"/><svg:title/><svg:desc/></draw:frame></text:span></text:p>
      <text:p text:style-name="P70">Figura 2.- Tests unitarios sobre la imagen BloodImage_00225.jpg</text:p>
      <text:p text:style-name="P71"/>
      <text:p text:style-name="P72">Donde se ve que se han llevado a cabo los 7 test y ha habido un fallo en<text:s/><text:span text:style-name="T73">test_totalCells()</text:span>, debido a que el número esperado de células detectadas no coincide con el real. Esto nos está indicando que la información recibida y procesada tiene el formato correcto pero que simplemente el número total de células no coincide con el real.<text:s/></text:p>
      <text:p text:style-name="P74">Si utilizamos otra de las imágenes (<text:span text:style-name="T75">BloodImage00022,jpg</text:span>), la salida es parecida:<text:s/></text:p>
      <text:p text:style-name="P76"><text:span text:style-name="T77"><draw:frame draw:style-name="a3" draw:name="Imagen 6" text:anchor-type="as-char" svg:x="0in" svg:y="0in" svg:width="4.59446in" svg:height="1.68514in" style:rel-width="scale" style:rel-height="scale"><draw:image xlink:href="media/image4.png" xlink:type="simple" xlink:show="embed" xlink:actuate="onLoad"/><svg:title/><svg:desc/></draw:frame></text:span></text:p>
      <text:p text:style-name="P78">Figura 3.- Tests unitarios sobre la imagen BloodImage00022.jpg</text:p>
      <text:p text:style-name="P79"/>
      <text:soft-page-break/>
      <text:p text:style-name="P80">Si obtuviésemos la cantidad de células esperadas, se conseguirían pasar todos los tests de forma exitosa como se observa en la imagen abajo:<text:s/></text:p>
      <text:p text:style-name="P81"><text:span text:style-name="T82"><draw:frame draw:style-name="a4" draw:name="Imagen 9" text:anchor-type="as-char" svg:x="0in" svg:y="0in" svg:width="3.31879in" svg:height="0.62154in" style:rel-width="scale" style:rel-height="scale"><draw:image xlink:href="media/image5.png" xlink:type="simple" xlink:show="embed" xlink:actuate="onLoad"/><svg:title/><svg:desc/></draw:frame></text:span></text:p>
      <text:p text:style-name="P83">Figura 4.- Tests unitarios pasados con éxito</text:p>
      <text:p text:style-name="P84"/>
      <text:p text:style-name="P85">Por lo tanto, todos los tests estarían bien y se estarían recibiendo los datos y valores adecuados. En el caso por ejemplo de que le pasemos un modelo que no exista y no se pueda cargar, se observa en la línea de comandos que ha habido 5 tests fallidos, indicando información sobre cada uno.<text:s/></text:p>
      <text:p text:style-name="P86"><text:span text:style-name="T87"><draw:frame draw:style-name="a5" draw:name="Imagen 7" text:anchor-type="as-char" svg:x="0in" svg:y="0in" svg:width="4.5164in" svg:height="1.36223in" style:rel-width="scale" style:rel-height="scale"><draw:image xlink:href="media/image6.png" xlink:type="simple" xlink:show="embed" xlink:actuate="onLoad"/><svg:title/><svg:desc/></draw:frame></text:span></text:p>
      <text:p text:style-name="P88">Figura 5.- Tests unitarios fallidos por no poder leer el modelo</text:p>
      <text:p text:style-name="P89"/>
      <text:p text:style-name="P90">Por otra parte, si se especifica que<text:s/><text:span text:style-name="T91">countCells()</text:span><text:s/>de<text:s/><text:span text:style-name="T92">ImageCell</text:span><text:s/>devuelva un número negativo, se obtendrán dos errores en los test, ya que el contador de células se espera que sea siempre positivo:<text:s/></text:p>
      <text:p text:style-name="P93"><text:span text:style-name="T94"><draw:frame draw:style-name="a6" draw:name="Imagen 8" text:anchor-type="as-char" svg:x="0in" svg:y="0in" svg:width="3.45078in" svg:height="1.88794in" style:rel-width="scale" style:rel-height="scale"><draw:image xlink:href="media/image7.png" xlink:type="simple" xlink:show="embed" xlink:actuate="onLoad"/><svg:title/><svg:desc/></draw:frame></text:span></text:p>
      <text:p text:style-name="P95">Figura 6.- Tests unitarios fallidos al obtener un número negativo en el conteo de células</text:p>
      <text:p text:style-name="Textbody"/>
      <text:p text:style-name="Textbody">Como se puede ver, con estas pruebas se pueden detectar fallos en el funcionamiento del algoritmo, siendo de gran utilidad para comprobar de forma rápida el procesamiento en la detección de células cuando se cambia alguna parte de las funciones de<text:s/><text:span text:style-name="T96">ImageCell</text:span>. <text:s/></text:p>
      <text:p text:style-name="Textbody"><text:s/></text:p>
      <text:p text:style-name="Textbody"/>
      <text:p text:style-name="Textbody"/>
      <text:p text:style-name="Textbody"/>
      <text:h text:style-name="Título1" text:outline-level="1"><text:bookmark-start text:name="_Toc131018589"/><text:bookmark-start text:name="__RefHeading___Toc428_3441010062"/><text:soft-page-break/>Diseño de la solución<text:bookmark-end text:name="_Toc131018589"/><text:s/><text:bookmark-end text:name="__RefHeading___Toc428_3441010062"/></text:h>
      <text:p text:style-name="P97">En esta sección 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P98" text:outline-level="2"><text:bookmark-start text:name="__RefHeading___Toc430_3441010062"/><text:bookmark-start text:name="_Toc131018590"/>Diagrama Estático de Clases<text:bookmark-end text:name="__RefHeading___Toc430_3441010062"/><text:bookmark-end text:name="_Toc131018590"/></text:h>
      <text:p text:style-name="P99">En este apartado se presenta el Diagrama UML Estático de Clases<text:s/>(véase la Figura 7). En él,<text:s/>se muestran las clases y<text:s/>atributos de la aplicación desarrollada, la estructura interna de los elementos, así como las relaciones que existen entre ellos.</text:p>
      <text:p text:style-name="P100"/>
      <text:p text:style-name="P101">La explicación de este diagrama se desarrollará en la próxima sección 2.2 a partir de la descripción de cada una de las clases con sus correspondientes funciones y de cómo se relacionan entre sí para conseguir el objetivo final que es el desarrollo de una aplicación capaz de detectar células de manera automática.</text:p>
      <text:p text:style-name="Textbody"/>
      <text:p text:style-name="Textbody"><text:span text:style-name="T102"><draw:frame draw:z-index="251659264" draw:id="id0" draw:style-name="a7" draw:name="Frame3" text:anchor-type="paragraph" svg:x="0in" svg:y="0.23403in" svg:width="6.14514in" svg:height="3.51875in" style:rel-width="scale" style:rel-height="scale"><draw:text-box><text:p text:style-name="P103"><text:span text:style-name="T104"><draw:frame draw:style-name="a8" draw:name="Imagen 10" text:anchor-type="as-char" svg:x="0in" svg:y="0in" svg:width="6.50857in" svg:height="4.08491in" style:rel-width="scale" style:rel-height="scale"><draw:image xlink:href="media/image8.png" xlink:type="simple" xlink:show="embed" xlink:actuate="onLoad"/><svg:title/><svg:desc>Diagrama

Descripción generada automáticamente</svg:desc></draw:frame></text:span></text:p><text:p text:style-name="P105">Figura 7.- Diagrama UML Estático de Clases</text:p></draw:text-box><svg:title/><svg:desc/></draw:frame></text:span></text:p>
      <text:p text:style-name="Textbody"/>
      <text:p text:style-name="Textbody"/>
      <text:p text:style-name="Textbody"/>
      <text:p text:style-name="Textbody"/>
      <text:p text:style-name="Textbody"/>
      <text:p text:style-name="Textbody"/>
      <text:h text:style-name="Título2" text:outline-level="2"><text:bookmark-start text:name="_Toc131018591"/><text:soft-page-break/>Descripción de las clases<text:bookmark-end text:name="_Toc131018591"/></text:h>
      <text:p text:style-name="P106">Como se ha dicho anteriormente,<text:s/>este apartado tiene la finalidad de describir todas y cada<text:s/>de las clases que conforman la aplicación, de explicar sus funciones principales y de establecer las relaciones entre las mismas.</text:p>
      <text:h text:style-name="Título3" text:outline-level="3"><text:bookmark-start text:name="_Toc131018592"/>CellCountApp<text:bookmark-end text:name="_Toc131018592"/></text:h>
      <text:p text:style-name="P107">Es la clase principal y la encargada de generar la interfaz en la que se va a desarrollar la aplicación de detección de células.<text:s/>Las funciones<text:s/>principales por las que está conformada son:</text:p>
      <text:list text:style-name="LFO23" text:continue-numbering="true">
        <text:list-item>
          <text:p text:style-name="P108"><text:span text:style-name="T109"><draw:frame draw:z-index="251663360" draw:id="id1" draw:style-name="a9" draw:name="Frame3" text:anchor-type="paragraph" svg:x="0in" svg:y="1.41667in" svg:width="6.20764in" svg:height="5.93264in" style:rel-width="scale" style:rel-height="scale"><draw:text-box><text:p text:style-name="P110"><text:span text:style-name="T111"><draw:frame draw:style-name="a10" draw:name="Imagen 25" text:anchor-type="as-char" svg:x="0in" svg:y="0in" svg:width="3.36645in" svg:height="5.30363in" style:rel-width="scale" style:rel-height="scale"><draw:image xlink:href="media/image9.png" xlink:type="simple" xlink:show="embed" xlink:actuate="onLoad"/><svg:title/><svg:desc>Diagrama

Descripción generada automáticamente</svg:desc></draw:frame></text:span></text:p><text:p text:style-name="P112">Figura 8.- Diagrama UML de Actividad del Método selectAndProcessImage(self)</text:p></draw:text-box><svg:title/><svg:desc/></draw:frame></text:span><text:span text:style-name="T113">selectAndProcessImage(self)</text:span>: si el usuario pulsa el botón<text:s/><text:span text:style-name="T114">Cargar imagen,<text:s/></text:span>esta función abre el directorio del usuario para que seleccione la imagen a procesar. A continuación, llama a la clase<text:s/><text:span text:style-name="T115">ImageCell</text:span>, que es la encargada de realizar la detección y conteo de células sobre esa imagen. Finalmente, muestra la imagen cargada, la imagen con la detección y el conteo de células en la interfaz. Este método es mostrado en la Figura 8 con su correspondiente diagrama de actividad.</text:p>
        </text:list-item>
      </text:list>
      <text:p text:style-name="P116"/>
      <text:p text:style-name="P117"/>
      <text:p text:style-name="P118"/>
      <text:p text:style-name="P119">Este algoritmo se inicia cuando el botón es pulsado. A continuación, si el usuario no selecciona ninguna imagen entonces no<text:s/>continua<text:s/>y no ocurre nada. Por el contrario, si el usuario selecciona una imagen del ordenador, entonces realiza sobre la misma el preprocesado correspondiente para la correcta detección de células, carga el modelo preentrenado y lo ejecuta sobre la imagen para predecir. Tras<text:s/>realizar esto, se ha producido la detección de células y, por tanto, ya puede realizar el conteo a partir del número de<text:s/><text:span text:style-name="T120">bounding boxes</text:span><text:s/>detectados. Finalmente, muestra en la aplicación el número total de células detectadas junto con la imagen seleccionada inicialmente y la imagen con los<text:s/><text:span text:style-name="T121">bounding boxes</text:span>.</text:p>
      <text:list text:style-name="LFO23" text:continue-numbering="true">
        <text:list-item>
          <text:p text:style-name="P122"><text:span text:style-name="T123">closeProcessedImage(self)</text:span>: función que al pulsar el botón<text:s/><text:span text:style-name="T124">Cerrar imagen</text:span><text:s/>cierra las imágenes y el conteo mostrados actualmente en la interfaz y habilita el botón para cargar otra imagen.</text:p>
        </text:list-item>
      </text:list>
      <text:p text:style-name="P125"/>
      <text:h text:style-name="Título3" text:outline-level="3"><text:bookmark-start text:name="_Toc131018593"/>ImageCell<text:bookmark-end text:name="_Toc131018593"/></text:h>
      <text:p text:style-name="P126">Clase que recibe el<text:s/><text:span text:style-name="T127">path</text:span><text:s/>de la imagen cargada por el usuario y el<text:s/><text:span text:style-name="T128">path</text:span><text:s/>del modelo preentrenado. Esta clase es la encargada de detectar, contar y mostrar células. Funciones:</text:p>
      <text:list text:style-name="LFO24" text:continue-numbering="true">
        <text:list-item>
          <text:p text:style-name="P129"><text:span text:style-name="T130">loadImage(self)</text:span>: función que lee la ruta de la imagen proporcionada por el usuario y guarda una copia.</text:p>
        </text:list-item>
        <text:list-item>
          <text:p text:style-name="P131"><text:span text:style-name="T132">prepareImage(self)</text:span>:<text:span text:style-name="T133"><text:s/></text:span>procesa la imagen que devuelve la función loadImage de tal manera que pueda ser utilizada por la red neuronal preentrenada.<text:s/></text:p>
        </text:list-item>
        <text:list-item>
          <text:p text:style-name="P134"><text:span text:style-name="T135">loadModel(self)</text:span>: carga el modelo preentrenado que será utilizado para realizar la predicción de células.</text:p>
        </text:list-item>
        <text:list-item>
          <text:p text:style-name="P136"><text:span text:style-name="T137">detectCells(self)</text:span>: ejecuta el modelo preentrenado cargado que devuelve la función loadModel y lo ejecuta sobre la imagen que devuelve PrepareImage para realizar su predicción. Esta función proporciona un array con los<text:s/><text:span text:style-name="T138">bounding boxes</text:span><text:s/>donde ha detectado células, la clase a la que pertenecen y la confianza en la predicción con la que ha detectado cada célula.</text:p>
        </text:list-item>
        <text:list-item>
          <text:p text:style-name="P139"><text:span text:style-name="T140">countCells(self)</text:span>: cuenta el número total de células detectadas en la imagen según el número de<text:s/><text:span text:style-name="T141">bounding boxes<text:s/></text:span>que ha devuelto la función detectCells<text:span text:style-name="T142">.</text:span></text:p>
        </text:list-item>
        <text:list-item>
          <text:p text:style-name="P143"><text:span text:style-name="T144">drawBoundingBox(self)</text:span>: función que dibuja los<text:s/><text:span text:style-name="T145">bounding boxes<text:s/></text:span>y el nivel de confianza (obtenidos de la función detectCells) sobre la imagen para que pueda ser posteriormente visualizado por el usuario gracias a la clase<text:s/><text:span text:style-name="T146">CellCountApp</text:span>. Para un mayor entendimiento de este algoritmo se puede visualizar la Figura 9.</text:p>
        </text:list-item>
      </text:list>
      <text:soft-page-break/>
      <text:p text:style-name="P147"><text:span text:style-name="T148"><draw:frame draw:z-index="251661312" draw:id="id2" draw:style-name="a11" draw:name="Frame3" text:anchor-type="paragraph" svg:x="0.82083in" svg:y="0.00556in" svg:width="5.21528in" svg:height="4.775in" style:rel-width="scale" style:rel-height="scale"><draw:text-box><text:p text:style-name="P149"><text:span text:style-name="T150"><draw:frame draw:style-name="a12" draw:name="Imagen 18" text:anchor-type="as-char" svg:x="0in" svg:y="0in" svg:width="3.725in" svg:height="4.28333in" style:rel-width="scale" style:rel-height="scale"><draw:image xlink:href="media/image10.png" xlink:type="simple" xlink:show="embed" xlink:actuate="onLoad"/><svg:title/><svg:desc/></draw:frame></text:span></text:p><text:p text:style-name="P151">Figura 9.- Diagrama UML de Actividad del Método drawBoundingBox(self)</text:p><text:p text:style-name="P152"/></draw:text-box><svg:title/><svg:desc/></draw:frame></text:span></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Como se puede ver,<text:s/>si no se han detectado células entonces el método no actúa, ya que no tendría que dibujar nada sobre la imagen, mientras que si se ha producido detección de células<text:s/>este método extrae los datos de cada detección. Una vez extraídos, reescala los parámetros del<text:s/><text:span text:style-name="T169">bounding box</text:span><text:s/>para que sea dibujado correctamente, y finalmente, dibuja en la imagen ese<text:s/><text:span text:style-name="T170">bounding box<text:s/></text:span>junto con<text:s/>otros datos de la detección como son el nivel de confianza y la clase. Esto lo realiza de manera iterativa tantas veces como detecciones de células haya en la imagen.<text:s/></text:p>
      <text:h text:style-name="Título3" text:outline-level="3"><text:bookmark-start text:name="_Toc131018594"/>TrainCell<text:bookmark-end text:name="_Toc131018594"/></text:h>
      <text:p text:style-name="P171">Clase encargada para el entrenamiento de YOLOv5 en el problema de detección de células. Cabe mencionar que esta clase en el diagrama UML estático de Clases no ha sido relacionada con ninguna porque su ejecución no es necesaria cada vez que se utiliza la aplicación, pero ha sido importante añadirla, ya que gracias a ella ha sido posible la creación del modelo preentrenado que sí que es utilizado por la clase<text:s/><text:span text:style-name="T172">ImageCell</text:span><text:s/>cada vez que se carga una imagen. Funciones:</text:p>
      <text:list text:style-name="LFO25" text:continue-numbering="true">
        <text:list-item>
          <text:p text:style-name="P173"><text:span text:style-name="T174">loadDataset(self)</text:span>: carga las imágenes (.jpg) y anotaciones (.txt) del<text:s/><text:span text:style-name="T175">path</text:span><text:s/>del dataset y los ordena.</text:p>
        </text:list-item>
        <text:list-item>
          <text:p text:style-name="P176"><text:span text:style-name="T177">splitDataset(self)</text:span>: divide el dataset cargado en el conjunto de entrenamiento y validación y los guarda en los directorios correspondientes. En concreto, destina el 80% de los datos para entrenar la red neuronal YOLOv5 y el 20% para validar.</text:p>
        </text:list-item>
        <text:list-item>
          <text:p text:style-name="P178"><text:span text:style-name="T179">saveSplittedDataset(self, trainImgPath: str, trainLabelPath: str, valImgPath: str, valLabelPath: str)</text:span>: función que recibe los<text:s/><text:span text:style-name="T180">paths</text:span><text:s/>donde van a ser guardadas las imágenes y<text:s/><text:soft-page-break/>anotaciones de entrenamiento y las imágenes y anotaciones de validación. Se encarga de guardar el dataset dividido anteriormente en entrenamiento y validación en las carpetas y en el formato esperado por la red neuronal YOLOv5. El Diagrama UML de Actividad de este método es mostrado en la Figura 10.<text:s/></text:p>
        </text:list-item>
      </text:list>
      <text:p text:style-name="P181">Este algoritmo consiste en lo siguiente: si el conjunto de entrenamiento que recibe contiene imágenes, entonces extrae cada imagen, obtiene tanto el nombre de archivo de la imagen como de sus anotaciones y los copia en los<text:s/><text:span text:style-name="T182">paths</text:span><text:s/>que recibe como argumento para las imágenes y para las anotaciones de<text:s/><text:span text:style-name="T183">train.<text:s/></text:span>Esto lo realiza de manera iterativa tantas veces como imágenes haya en el conjunto de entrenamiento.<text:s/>Cuando ya no quedan más imágenes de entrenamiento, de igual manera se realiza para el conjunto de validación: si el conjunto que recibe contiene imágenes, entonces extrae cada imagen, obtiene tanto el nombre de archivo de la imagen como de sus anotaciones y los copia en los<text:s/><text:span text:style-name="T184">paths</text:span><text:s/>que recibe como argumento<text:span text:style-name="T185">.<text:s/></text:span>Esto lo realiza tantas veces como imágenes haya en el conjunto de validación.</text:p>
      <text:p text:style-name="P186"><text:span text:style-name="T187"><draw:frame draw:z-index="251665408" draw:id="id3" draw:style-name="a13" draw:name="Frame3" text:anchor-type="paragraph" svg:x="0in" svg:y="0.11528in" svg:width="5.63194in" svg:height="4.29167in" style:rel-width="scale" style:rel-height="scale"><draw:text-box><text:p text:style-name="P188"><text:span text:style-name="T189"><draw:frame draw:style-name="a14" draw:name="Imagen 19" text:anchor-type="as-char" svg:x="0in" svg:y="0in" svg:width="5.85417in" svg:height="3.16667in" style:rel-width="scale" style:rel-height="scale"><draw:image xlink:href="media/image11.png" xlink:type="simple" xlink:show="embed" xlink:actuate="onLoad"/><svg:title/><svg:desc/></draw:frame></text:span></text:p><text:p text:style-name="P190">Figura 10.- Diagrama UML de Actividad del Método saveSplittedDataset(self, trainImgPath: str, trainLabelPath: str, valImgPath: str, valLabelPath: str)</text:p><text:p text:style-name="P191"/></draw:text-box><svg:title/><svg:desc/></draw:frame></text:span></text:p>
      <text:p text:style-name="P192"/>
      <text:p text:style-name="P193"/>
      <text:p text:style-name="P194"/>
      <text:p text:style-name="P195"/>
      <text:p text:style-name="P196"/>
      <text:p text:style-name="P197"/>
      <text:p text:style-name="P198"/>
      <text:p text:style-name="P199"/>
      <text:p text:style-name="P200"/>
      <text:p text:style-name="P201"/>
      <text:list text:style-name="LFO25" text:continue-numbering="true">
        <text:list-item>
          <text:p text:style-name="P202"><text:span text:style-name="T203">trainModel(self, batch: int, epochs: int)</text:span>: encargada de entrenar la red neuronal YOLOv5 a partir del dataset configurado. Además, recibe como argumento el tamaño del<text:s/><text:span text:style-name="T204">batch</text:span><text:s/>y el número de épocas a entrenar.<text:s/></text:p>
        </text:list-item>
        <text:list-item>
          <text:p text:style-name="P205"><text:span text:style-name="T206">saveModel(self, path_weight: str, path_save: str)</text:span>: función encargada de cargar el modelo YOLOv5 junto con sus pesos entrenados y finalmente, guardar el modelo completo preentrenado. Para ello, recibe como argumentos el<text:s/><text:span text:style-name="T207">path</text:span><text:s/>donde se han guardado los pesos del modelo entrenado para el problema de detección de células y el<text:s/><text:span text:style-name="T208">path</text:span><text:s/>donde se quiere guardar el modelo completo preentrenado.</text:p>
        </text:list-item>
      </text:list>
      <text:p text:style-name="P209"/>
      <text:h text:style-name="Título2" text:outline-level="2"><text:bookmark-start text:name="_Toc131018595"/><text:bookmark-start text:name="__RefHeading___Toc432_3441010062"/><text:soft-page-break/>Diagrama de Secuencia<text:bookmark-end text:name="_Toc131018595"/></text:h>
      <text:p text:style-name="Textbody">En esta sección se presenta el diagrama de secuencia entre las clases<text:s/><text:span text:style-name="T210">CellCountApp</text:span><text:s/>e<text:s/><text:span text:style-name="T211">ImageCell</text:span><text:s/>mostrado en la Figura 11. La forma de interacción de estas clases ocurre de la siguiente manera:<text:s/></text:p>
      <text:list text:style-name="LFO26" text:continue-numbering="true">
        <text:list-item>
          <text:p text:style-name="P212">Al cargar<text:s/><text:span text:style-name="T213">CellCountApp</text:span>, se abre la interfaz de la aplicación donde aparecen los botones de interacción “Cargar imagen“ <text:s/>y <text:s/>“Cerrar imagen”.<text:s/></text:p>
        </text:list-item>
        <text:list-item>
          <text:p text:style-name="P214">Cuando se pulsa el botón “Cargar imagen”, se llama a la función<text:s/><text:span text:style-name="T215">selectAndProcessImage()</text:span>, que proporciona la herramienta necesaria para que el usuario seleccione la ruta de la imagen.<text:s/></text:p>
        </text:list-item>
        <text:list-item>
          <text:p text:style-name="P216">Una vez seleccionada la imagen, esta se carga mediante el uso de<text:s/><text:span text:style-name="T217">loadImage()</text:span><text:s/>de<text:s/><text:span text:style-name="T218">ImageCell</text:span><text:s/>y se procesa con<text:s/><text:span text:style-name="T219">prepareImage()<text:s/></text:span>para poder realizar la inferencia. Todas estas funciones son llamadas de la clase<text:s/><text:span text:style-name="T220">CellCountApp</text:span><text:s/>a la clase<text:s/><text:span text:style-name="T221">ImageCell</text:span>.</text:p>
        </text:list-item>
        <text:list-item>
          <text:p text:style-name="P222">Después se carga el modelo con loadModel() y se realiza la detección con detectCells().<text:s/></text:p>
        </text:list-item>
        <text:list-item>
          <text:p text:style-name="P223">Se obtiene el número total de células detectadas mediante<text:s/><text:span text:style-name="T224">countCells()</text:span><text:s/>y este valor es mostrado en la interfaz.<text:s/></text:p>
        </text:list-item>
        <text:list-item>
          <text:p text:style-name="P225">Por último, se procesan los<text:span text:style-name="T226"><text:s/>bounding boxes</text:span><text:s/>de las células detectadas mediante<text:s/><text:span text:style-name="T227">drawBoundingBox()</text:span><text:s/>que devuelve la imagen procesada que es mostrada en la interfaz de<text:s/><text:span text:style-name="T228">CellCountApp</text:span>.<text:s/></text:p>
        </text:list-item>
      </text:list>
      <text:soft-page-break/>
      <text:p text:style-name="P229"><text:span text:style-name="T230"><draw:frame draw:style-name="a15" draw:name="Imagen 3" text:anchor-type="as-char" svg:x="0in" svg:y="0in" svg:width="6.69306in" svg:height="6.93125in" style:rel-width="scale" style:rel-height="scale"><draw:image xlink:href="media/image12.png" xlink:type="simple" xlink:show="embed" xlink:actuate="onLoad"/><svg:title/><svg:desc>Imagen que contiene Tabla

Descripción generada automáticamente</svg:desc></draw:frame></text:span></text:p>
      <text:p text:style-name="P231">Figura 11.- Diagrama UML de Secuencia de las clases CellCountApp e ImageCell<text:bookmark-end text:name="__RefHeading___Toc432_3441010062"/></text:p>
      <text:p text:style-name="Sinespaciado"/>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0">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3-29T22:58:00Z</dc:date>
    <meta:template xlink:href="Normal" xlink:type="simple"/>
    <meta:editing-cycles>22</meta:editing-cycles>
    <meta:editing-duration>PT27180S</meta:editing-duration>
    <meta:document-statistic meta:page-count="11" meta:paragraph-count="28" meta:word-count="2194" meta:character-count="14234" meta:row-count="100" meta:non-whitespace-character-count="12068"/>
  </office:meta>
</office:document-meta>
</file>