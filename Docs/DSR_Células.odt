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Textbody" style:family="paragraph">
      <style:paragraph-properties fo:text-align="justify"/>
    </style:style>
    <style:style style:name="P25" style:parent-style-name="Standard" style:family="paragraph">
      <style:paragraph-properties fo:text-align="justify"/>
    </style:style>
    <style:style style:name="T26" style:parent-style-name="Fuentedepárrafopredeter." style:family="text">
      <style:text-properties fo:font-style="italic" style:font-style-asian="italic"/>
    </style:style>
    <style:style style:name="T27" style:parent-style-name="Fuentedepárrafopredeter." style:family="text">
      <style:text-properties fo:font-size="16pt" style:font-size-asian="16pt" style:font-size-complex="16pt"/>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T30" style:parent-style-name="Fuentedepárrafopredeter." style:family="text">
      <style:text-properties fo:font-style="italic" style:font-style-asian="italic" style:font-style-complex="italic"/>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T33" style:parent-style-name="Fuentedepárrafopredeter." style:family="text">
      <style:text-properties fo:font-weight="bold" style:font-weight-asian="bold" style:font-weight-complex="bold"/>
    </style:style>
    <style:style style:name="P34" style:parent-style-name="Standard" style:family="paragraph">
      <style:paragraph-properties fo:text-align="justify"/>
    </style:style>
    <style:style style:name="T35" style:parent-style-name="Fuentedepárrafopredeter." style:family="text">
      <style:text-properties fo:font-weight="bold" style:font-weight-asian="bold" style:font-weight-complex="bold"/>
    </style:style>
    <style:style style:name="P36" style:parent-style-name="Standard" style:family="paragraph">
      <style:paragraph-properties fo:text-align="justify"/>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style="italic" style:font-style-asian="italic" style:font-style-complex="italic"/>
    </style:style>
    <style:style style:name="P39" style:parent-style-name="Standard" style:family="paragraph">
      <style:paragraph-properties fo:text-align="justify"/>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style="italic" style:font-style-asian="italic" style:font-style-complex="italic"/>
    </style:style>
    <style:style style:name="T42" style:parent-style-name="Fuentedepárrafopredeter." style:family="text">
      <style:text-properties fo:font-style="italic" style:font-style-asian="italic" style:font-style-complex="italic"/>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font-weight-complex="bold"/>
    </style:style>
    <style:style style:name="P45" style:parent-style-name="Standard" style:family="paragraph">
      <style:paragraph-properties fo:text-align="justify"/>
    </style:style>
    <style:style style:name="T46" style:parent-style-name="Fuentedepárrafopredeter." style:family="text">
      <style:text-properties fo:font-weight="bold" style:font-weight-asian="bold" style:font-weight-complex="bold"/>
    </style:style>
    <style:style style:name="P47" style:parent-style-name="Standard" style:family="paragraph">
      <style:paragraph-properties fo:text-align="justify"/>
    </style:style>
    <style:style style:name="T48" style:parent-style-name="Fuentedepárrafopredeter." style:family="text">
      <style:text-properties fo:font-weight="bold" style:font-weight-asian="bold" style:font-weight-complex="bold"/>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T57" style:parent-style-name="Fuentedepárrafopredeter." style:family="text">
      <style:text-properties fo:font-style="italic" style:font-style-asian="italic" style:font-style-complex="italic"/>
    </style:style>
    <style:style style:name="T58" style:parent-style-name="Fuentedepárrafopredeter." style:family="text">
      <style:text-properties fo:font-style="italic" style:font-style-asian="italic" style:font-style-complex="italic"/>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T61" style:parent-style-name="Fuentedepárrafopredeter." style:family="text">
      <style:text-properties style:language-asian="es" style:country-asian="ES" style:language-complex="ar" style:country-complex="SA"/>
    </style:style>
    <style:style style:name="P62" style:parent-style-name="Figura" style:family="paragraph">
      <style:paragraph-properties fo:text-align="center"/>
    </style:style>
    <style:style style:name="P63" style:parent-style-name="Figura" style:family="paragraph">
      <style:paragraph-properties fo:text-align="center"/>
    </style:style>
    <style:style style:name="P64" style:parent-style-name="Textbody" style:family="paragraph">
      <style:paragraph-properties fo:text-align="justify"/>
    </style:style>
    <style:style style:name="T65" style:parent-style-name="Fuentedepárrafopredeter." style:family="text">
      <style:text-properties style:language-asian="es" style:country-asian="ES" style:language-complex="ar" style:country-complex="SA"/>
    </style:style>
    <style:style style:name="P66" style:parent-style-name="Figura" style:family="paragraph">
      <style:paragraph-properties fo:text-align="center"/>
      <style:text-properties fo:font-style="normal" style:font-style-asian="normal" style:font-style-complex="normal"/>
    </style:style>
    <style:style style:name="P67" style:parent-style-name="Figura" style:family="paragraph">
      <style:paragraph-properties fo:text-align="center"/>
    </style:style>
    <style:style style:name="T68" style:parent-style-name="Fuentedepárrafopredeter." style:family="text">
      <style:text-properties fo:font-style="normal" style:font-style-asian="normal" style:font-style-complex="normal"/>
    </style:style>
    <style:style style:name="P69" style:parent-style-name="Figura" style:family="paragraph">
      <style:paragraph-properties fo:text-align="center"/>
    </style:style>
    <style:style style:name="T70" style:parent-style-name="Fuentedepárrafopredeter." style:family="text">
      <style:text-properties fo:font-style="italic" style:font-style-asian="italic" style:font-style-complex="italic"/>
    </style:style>
    <style:style style:name="P71" style:parent-style-name="Textbody" style:family="paragraph">
      <style:paragraph-properties fo:text-align="justify"/>
    </style:style>
    <style:style style:name="T72" style:parent-style-name="Fuentedepárrafopredeter." style:family="text">
      <style:text-properties style:language-asian="es" style:country-asian="ES" style:language-complex="ar" style:country-complex="SA"/>
    </style:style>
    <style:style style:name="P73" style:parent-style-name="Figura" style:family="paragraph">
      <style:paragraph-properties fo:text-align="center"/>
      <style:text-properties fo:font-style="normal" style:font-style-asian="normal" style:font-style-complex="normal"/>
    </style:style>
    <style:style style:name="P74" style:parent-style-name="Figura" style:family="paragraph">
      <style:paragraph-properties fo:text-align="center"/>
    </style:style>
    <style:style style:name="P75" style:parent-style-name="Figura" style:family="paragraph">
      <style:paragraph-properties fo:text-align="center"/>
    </style:style>
    <style:style style:name="TableColumn77" style:family="table-column">
      <style:table-column-properties style:column-width="1.4736in"/>
    </style:style>
    <style:style style:name="TableColumn78" style:family="table-column">
      <style:table-column-properties style:column-width="5.2125in"/>
    </style:style>
    <style:style style:name="Table76" style:family="table">
      <style:table-properties style:width="6.6861in" fo:margin-left="0in" table:align="center"/>
    </style:style>
    <style:style style:name="TableRow79" style:family="table-row">
      <style:table-row-properties style:min-row-height="0.309in"/>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Textbody" style:family="paragraph">
      <style:paragraph-properties fo:text-align="center" fo:margin-bottom="0in"/>
      <style:text-properties fo:font-weight="bold" style:font-weight-asian="bold" fo:font-style="italic" style:font-style-asian="italic"/>
    </style:style>
    <style:style style:name="TableRow82" style:family="table-row">
      <style:table-row-properties/>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Textbody" style:family="paragraph">
      <style:paragraph-properties fo:text-align="center" fo:margin-bottom="0in"/>
      <style:text-properties fo:font-weight="bold" style:font-weight-asian="bold"/>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Textbody" style:family="paragraph">
      <style:paragraph-properties fo:text-align="center" fo:margin-bottom="0in"/>
    </style:style>
    <style:style style:name="TableRow87" style:family="table-row">
      <style:table-row-propertie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Textbody" style:family="paragraph">
      <style:paragraph-properties fo:text-align="center" fo:margin-bottom="0in"/>
      <style:text-properties fo:font-weight="bold" style:font-weight-asian="bold"/>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Textbody" style:family="paragraph">
      <style:paragraph-properties fo:text-align="center" fo:margin-bottom="0in"/>
    </style:style>
    <style:style style:name="TableRow92" style:family="table-row">
      <style:table-row-properties/>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Textbody" style:family="paragraph">
      <style:paragraph-properties fo:text-align="center" fo:margin-bottom="0in"/>
      <style:text-properties fo:font-weight="bold" style:font-weight-asian="bold"/>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Textbody" style:family="paragraph">
      <style:paragraph-properties fo:text-align="center" fo:margin-bottom="0in"/>
    </style:style>
    <style:style style:name="TableRow97" style:family="table-row">
      <style:table-row-properties/>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Textbody" style:family="paragraph">
      <style:paragraph-properties fo:text-align="center" fo:margin-bottom="0in"/>
      <style:text-properties fo:font-weight="bold" style:font-weight-asian="bold"/>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Textbody" style:family="paragraph">
      <style:paragraph-properties fo:text-align="center" fo:margin-bottom="0in"/>
    </style:style>
    <style:style style:name="TableRow102" style:family="table-row">
      <style:table-row-propertie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Textbody" style:family="paragraph">
      <style:paragraph-properties fo:text-align="center" fo:margin-bottom="0in"/>
      <style:text-properties fo:font-weight="bold" style:font-weight-asian="bold"/>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Textbody" style:family="paragraph">
      <style:paragraph-properties fo:text-align="center" fo:margin-bottom="0in"/>
    </style:style>
    <style:style style:name="TableRow107" style:family="table-row">
      <style:table-row-propertie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Textbody" style:family="paragraph">
      <style:paragraph-properties fo:text-align="center" fo:margin-bottom="0in"/>
      <style:text-properties fo:font-weight="bold" style:font-weight-asian="bold"/>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Textbody" style:family="paragraph">
      <style:paragraph-properties fo:text-align="center" fo:margin-bottom="0in"/>
    </style:style>
    <style:style style:name="TableRow112" style:family="table-row">
      <style:table-row-propertie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Textbody" style:family="paragraph">
      <style:paragraph-properties fo:text-align="center" fo:margin-bottom="0in"/>
      <style:text-properties fo:font-weight="bold" style:font-weight-asian="bold"/>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Textbody" style:family="paragraph">
      <style:paragraph-properties fo:text-align="center" fo:margin-bottom="0in"/>
    </style:style>
    <style:style style:name="TableRow117" style:family="table-row">
      <style:table-row-propertie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Textbody" style:family="paragraph">
      <style:paragraph-properties fo:text-align="center" fo:margin-bottom="0in"/>
      <style:text-properties fo:font-weight="bold" style:font-weight-asian="bold"/>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Textbody" style:family="paragraph">
      <style:paragraph-properties fo:text-align="center" fo:margin-bottom="0in"/>
    </style:style>
    <style:style style:name="TableRow122" style:family="table-row">
      <style:table-row-propertie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Textbody" style:family="paragraph">
      <style:paragraph-properties fo:text-align="center" fo:margin-bottom="0in"/>
      <style:text-properties fo:font-weight="bold" style:font-weight-asian="bold"/>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Textbody" style:family="paragraph">
      <style:paragraph-properties fo:text-align="center" fo:margin-bottom="0in"/>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fo:margin-left="0.5in">
        <style:tab-stops/>
      </style:paragraph-properties>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T147" style:parent-style-name="Fuentedepárrafopredeter." style:family="text">
      <style:text-properties fo:font-weight="bold" style:font-weight-asian="bold" style:font-weight-complex="bold"/>
    </style:style>
    <style:style style:name="P148" style:parent-style-name="Textbody" style:family="paragraph">
      <style:paragraph-properties fo:text-align="justify" fo:margin-left="0.25in">
        <style:tab-stops/>
      </style:paragraph-properties>
    </style:style>
    <style:style style:name="T149" style:parent-style-name="Fuentedepárrafopredeter." style:family="text">
      <style:text-properties style:text-underline-type="single" style:text-underline-style="solid" style:text-underline-width="auto" style:text-underline-mode="continuous"/>
    </style:style>
    <style:style style:name="P150" style:parent-style-name="Textbody" style:family="paragraph">
      <style:paragraph-properties fo:text-align="justify" fo:margin-left="0.25in">
        <style:tab-stops/>
      </style:paragraph-properties>
    </style:style>
    <style:style style:name="T151" style:parent-style-name="Fuentedepárrafopredeter." style:family="text">
      <style:text-properties style:text-underline-type="single" style:text-underline-style="solid" style:text-underline-width="auto" style:text-underline-mode="continuous"/>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fo:margin-left="0.4923in">
        <style:tab-stops/>
      </style:paragraph-properties>
    </style:style>
    <style:style style:name="T162" style:parent-style-name="Fuentedepárrafopredeter." style:family="text">
      <style:text-properties style:text-underline-type="single" style:text-underline-style="solid" style:text-underline-width="auto" style:text-underline-mode="continuous"/>
    </style:style>
    <style:style style:name="P163" style:parent-style-name="Textbody" style:family="paragraph">
      <style:paragraph-properties fo:text-align="center"/>
    </style:style>
    <style:style style:name="T164" style:parent-style-name="Fuentedepárrafopredeter." style:family="text">
      <style:text-properties style:language-asian="es" style:country-asian="ES" style:language-complex="ar" style:country-complex="SA"/>
    </style:style>
    <style:style style:name="P165" style:parent-style-name="Figura" style:family="paragraph">
      <style:paragraph-properties fo:text-align="center"/>
    </style:style>
    <style:style style:name="T166" style:parent-style-name="Fuentedepárrafopredeter." style:family="text">
      <style:text-properties style:language-asian="es" style:country-asian="ES" style:language-complex="ar" style:country-complex="SA"/>
    </style:style>
    <style:style style:name="P167" style:parent-style-name="Figura" style:family="paragraph">
      <style:paragraph-properties fo:text-align="center"/>
    </style:style>
    <style:style style:name="P168" style:parent-style-name="Textbody" style:family="paragraph">
      <style:paragraph-properties fo:text-align="justify"/>
    </style:style>
    <style:style style:name="T169" style:parent-style-name="Fuentedepárrafopredeter." style:family="text">
      <style:text-properties fo:font-weight="bold" style:font-weight-asian="bold" style:font-weight-complex="bold"/>
    </style:style>
    <style:style style:name="P170" style:parent-style-name="Textbody" style:family="paragraph">
      <style:paragraph-properties fo:text-align="justify" fo:margin-left="0.25in">
        <style:tab-stops/>
      </style:paragraph-properties>
    </style:style>
    <style:style style:name="T171" style:parent-style-name="Fuentedepárrafopredeter." style:family="text">
      <style:text-properties style:text-underline-type="single" style:text-underline-style="solid" style:text-underline-width="auto" style:text-underline-mode="continuous"/>
    </style:style>
    <style:style style:name="P172" style:parent-style-name="Textbody" style:family="paragraph">
      <style:paragraph-properties fo:text-align="justify" fo:margin-left="0.25in">
        <style:tab-stops/>
      </style:paragraph-properties>
    </style:style>
    <style:style style:name="T173" style:parent-style-name="Fuentedepárrafopredeter." style:family="text">
      <style:text-properties style:text-underline-type="single" style:text-underline-style="solid" style:text-underline-width="auto" style:text-underline-mode="continuous"/>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T176" style:parent-style-name="Fuentedepárrafopredeter." style:family="text">
      <style:text-properties fo:font-style="italic" style:font-style-asian="italic"/>
    </style:style>
    <style:style style:name="T177" style:parent-style-name="Fuentedepárrafopredeter." style:family="text">
      <style:text-properties fo:font-style="italic" style:font-style-asian="italic"/>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fo:margin-left="0.25in">
        <style:tab-stops/>
      </style:paragraph-properties>
    </style:style>
    <style:style style:name="T181" style:parent-style-name="Fuentedepárrafopredeter." style:family="text">
      <style:text-properties style:text-underline-type="single" style:text-underline-style="solid" style:text-underline-width="auto" style:text-underline-mode="continuous"/>
    </style:style>
    <style:style style:name="P182" style:parent-style-name="Textbody" style:family="paragraph">
      <style:paragraph-properties fo:text-align="justify"/>
    </style:style>
    <style:style style:name="T183" style:parent-style-name="Fuentedepárrafopredeter." style:family="text">
      <style:text-properties fo:font-weight="bold" style:font-weight-asian="bold" style:font-weight-complex="bold"/>
    </style:style>
    <style:style style:name="P184" style:parent-style-name="Textbody" style:family="paragraph">
      <style:paragraph-properties fo:text-align="justify"/>
    </style:style>
    <style:style style:name="T185" style:parent-style-name="Fuentedepárrafopredeter." style:family="text">
      <style:text-properties style:text-underline-type="single" style:text-underline-style="solid" style:text-underline-width="auto" style:text-underline-mode="continuous"/>
    </style:style>
    <style:style style:name="P186" style:parent-style-name="Textbody" style:family="paragraph">
      <style:paragraph-properties fo:text-align="justify"/>
    </style:style>
    <style:style style:name="T187" style:parent-style-name="Fuentedepárrafopredeter." style:family="text">
      <style:text-properties style:text-underline-type="single" style:text-underline-style="solid" style:text-underline-width="auto" style:text-underline-mode="continuous"/>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T194" style:parent-style-name="Fuentedepárrafopredeter." style:family="text">
      <style:text-properties style:text-underline-type="single" style:text-underline-style="solid" style:text-underline-width="auto" style:text-underline-mode="continuous"/>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family="graphic" style:name="a6" style:parent-style-name="Graphics">
      <style:graphic-properties fo:border="0.01042in none" fo:background-color="transparent"/>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32633in, 0.45809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office:automatic-styles>
  <office:body>
    <office:text text:use-soft-page-breaks="true">
      <text:p text:style-name="P1"/>
      <text:p text:style-name="Título">Proyecto: Detección y conteo de células en imágenes de microscopía</text:p>
      <text:p text:style-name="Subtítulo">Documento de Requisitos del Sistema (DRS)</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Propósito del documento<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 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n esta sección se proporcionará una introducción a todo el documento. Consta de varias subsecciones: propósito, ámbito del sistema, definiciones, referencias y visión general del documento.</text:p>
      <text:h text:style-name="Título2" text:outline-level="2"><text:bookmark-start text:name="__RefHeading___Toc418_3441010062"/>Propósito del documento<text:bookmark-end text:name="__RefHeading___Toc418_3441010062"/></text:h>
      <text:p text:style-name="P25">Documento dirigido al cliente José Francisco Vélez Serrano y a la dirección de<text:s/><text:span text:style-name="T26">VisionAll</text:span>. El objetivo de este documento es proporcionar una descripción detallada de las necesidades y requisitos del proyecto.</text:p>
      <text:h text:style-name="Título2" text:outline-level="2"><text:bookmark-start text:name="__RefHeading___Toc420_3441010062"/>Alcance del<text:s/><text:span text:style-name="T27">sistema</text:span><text:bookmark-end text:name="__RefHeading___Toc420_3441010062"/></text:h>
      <text:p text:style-name="P28">Se desea crear una aplicación que sea capaz de detectar y contar células al introducir una imagen de microscopía. En adelante, se denominará a dicha aplicación con el nombre CellCountApp.</text:p>
      <text:p text:style-name="P29">CellCountApp estará diseñada principalmente para el conteo de células al enviar una imagen de microscopio. Además, será capaz de localizar cada una de las células con<text:s/><text:span text:style-name="T30">bounding box</text:span>. Esta aplicación podrá utilizarse con cualquier clase de célula, lo que implica que deberá reconocer distintos tipos de las mismas, así como una posible superposición entre ellas.</text:p>
      <text:p text:style-name="P31">Disponer de esta aplicación brinda un gran apoyo para el personal sanitario, permitiéndoles reducir el gasto de tiempo en esta actividad.</text:p>
      <text:h text:style-name="Título2" text:outline-level="2"><text:bookmark-start text:name="__RefHeading___Toc422_3441010062"/>Definiciones, acrónimos y abreviaturas<text:bookmark-end text:name="__RefHeading___Toc422_3441010062"/></text:h>
      <text:p text:style-name="P32"><text:span text:style-name="T33">Bounding box.-</text:span><text:s/>rectángulo o cuadrado cuya función es delimitar los límites del objeto dentro de una imagen. Su estructura suele estar conformada por 4 valores: (x, y, anchura, altura). Se utilizará para identificar el lugar de cada célula en la imagen.</text:p>
      <text:p text:style-name="P34"><text:span text:style-name="T35">Machine learning.-<text:s/></text:span>disciplina del campo de la Inteligencia Artificial que, a través de algoritmos, dota a los ordenadores de la capacidad de identificar patrones en datos masivos y elaborar predicciones (análisis predictivo).</text:p>
      <text:p text:style-name="P36"><text:span text:style-name="T37">Deep learning.-<text:s/></text:span>conjunto de algoritmos de<text:s/><text:span text:style-name="T38">machine learning</text:span><text:s/>que intenta modelar abstracciones de alto nivel en datos usando arquitecturas computacionales que admiten transformaciones no lineales múltiples e iterativas de datos expresados en forma matricial o tensorial. ​</text:p>
      <text:p text:style-name="P39"><text:span text:style-name="T40">Red neuronal.-<text:s/></text:span>es un método de la inteligencia artificial que enseña a las computadoras a procesar datos de una manera que está inspirada en la forma en que lo hace el cerebro humano. Se trata de un tipo de proceso de<text:s/><text:span text:style-name="T41">machine learning</text:span><text:s/>llamado<text:s/><text:span text:style-name="T42">deep learning</text:span>, que utiliza los nodos o las neuronas interconectados en una estructura de capas que se parece al cerebro humano. Crea un sistema adaptable que las computadoras utilizan para aprender de sus errores y mejorar continuamente. De esta forma, las redes neuronales artificiales intentan resolver problemas y aprender, como es en este caso a detectar células.</text:p>
      <text:p text:style-name="P43"><text:span text:style-name="T44">Red neuronal convolucional</text:span>.- tipo de red neuronal que consiste en múltiples capas de filtros convolucionales de una o más dimensiones. Después de cada capa, por lo general se añade una función para realizar un mapeo causal no-lineal.</text:p>
      <text:p text:style-name="P45"><text:span text:style-name="T46">Transfer learning-</text:span><text:s/>método de aprendizaje automático en el que un modelo desarrollado para una tarea en concreto se puede usar como punto de partida para el desarrollo de otro modelo con otra tarea distinta de la primera.</text:p>
      <text:p text:style-name="P47"><text:span text:style-name="T48">Interfaz gráfica o GUI-</text:span><text:s/>es el entorno visual de imágenes y objetos mediante el cual una máquina y un usuario interactúan.<text:s/></text:p>
      <text:p text:style-name="P49"/>
      <text:h text:style-name="Título2" text:outline-level="2"><text:bookmark-start text:name="__RefHeading___Toc424_3441010062"/>Referencias<text:bookmark-end text:name="__RefHeading___Toc424_3441010062"/></text:h>
      <text:list text:style-name="LFO9" text:continue-numbering="true">
        <text:list-item>
          <text:p text:style-name="P50">Aplicación VGG para etiquetar muestra [<text:a xlink:href="https://www.robots.ox.ac.uk/~vgg/software/via/" office:target-frame-name="_top" xlink:show="replace">web</text:a>]</text:p>
        </text:list-item>
        <text:list-item>
          <text:p text:style-name="P51">Interleave 2 of 5 [<text:a xlink:href="http://web.archive.org/web/20120423162022/http:/www.barcodeisland.com/int2of5.phtml" office:target-frame-name="_top" xlink:show="replace">permalink</text:a>]</text:p>
        </text:list-item>
        <text:list-item>
          <text:p text:style-name="P52">Code 3 of 9 [<text:a xlink:href="http://web.archive.org/web/20120522092328/http:/www.barcodeisland.com/code39.phtml" office:target-frame-name="_top" xlink:show="replace">permalink</text:a>]</text:p>
        </text:list-item>
      </text:list>
      <text:h text:style-name="Título2" text:outline-level="2"><text:bookmark-start text:name="__RefHeading___Toc426_3441010062"/>Descripción del resto del documento<text:bookmark-end text:name="__RefHeading___Toc426_3441010062"/></text:h>
      <text:p text:style-name="P53">En la sección 2 se describe de manera general el producto, incluyendo todos aquellos factores que afectan al mismo y a sus requisitos. Finalmente, se incluye una sección 3 donde se describen de manera detallada los requisitos necesarios para el desarrollo del sistema.</text:p>
      <text:h text:style-name="Título1" text:outline-level="1"><text:bookmark-start text:name="__RefHeading___Toc428_3441010062"/><text:soft-page-break/>Descripción general<text:bookmark-end text:name="__RefHeading___Toc428_3441010062"/></text:h>
      <text:p text:style-name="P54">En esta sección se describen todos aquellos factores que afectan al producto y a sus requisitos. No se describen los requisitos, sino su contexto, ya que en la sección 3 se definirán con detalle estos requisitos facilitando así su entendimiento.</text:p>
      <text:h text:style-name="Título2" text:outline-level="2"><text:bookmark-start text:name="__RefHeading___Toc430_3441010062"/>Perspectiva del producto<text:bookmark-end text:name="__RefHeading___Toc430_3441010062"/></text:h>
      <text:p text:style-name="P55">La finalidad del proyecto es poder desarrollar una aplicación (tipo interfaz gráfica) en Python con una arquitectura de cliente/servidor, de tal manera que el usuario pueda comunicarse con la aplicación creada. Es decir, que el cliente mande una imagen al servidor, este la procese, realice la detección de células y devuelva dicha imagen al cliente junto con el número de células encontradas.</text:p>
      <text:p text:style-name="P56">Para abordar este problema se pretende utilizar técnicas robustas de<text:s/><text:span text:style-name="T57">deep learning<text:s/></text:span>como son las redes neuronales. En concreto, la idea es usar la arquitectura YOLO, la cual es una red neuronal convolucional cuya función es la detección de objetos. En concreto, esta arquitectura pretende utilizarse a partir de el método de<text:s/><text:span text:style-name="T58">transfer learning</text:span>. Cabe mencionar que esto podría estar sujeto a modificaciones.</text:p>
      <text:p text:style-name="P59">Inicialmente, este sistema será diseñado para la detección y conteo de células, pero podría seguir creciendo añadiendo más funcionalidades como es la identificación del tipo de célula. También se podrían utilizar otro tipo de imágenes pertenecientes a distintos tipos de microscopios, y ampliando así el desarrollo a técnicas de multimodalidad.</text:p>
      <text:h text:style-name="Título2" text:outline-level="2"><text:bookmark-start text:name="__RefHeading___Toc432_3441010062"/>Funciones del producto<text:bookmark-end text:name="__RefHeading___Toc432_3441010062"/></text:h>
      <text:p text:style-name="P60">La aplicación recibirá una imagen de microscopía en color como es la mostrada en la Figura 1, y sobre la misma se realizará la detección de las células.</text:p>
      <text:p text:style-name="Textbody"/>
      <text:p text:style-name="Textbody"><text:span text:style-name="T61"><draw:frame draw:z-index="251658240" draw:id="id0" draw:style-name="a1" draw:name="Frame3" text:anchor-type="paragraph" svg:x="0in" svg:y="0.00903in" svg:width="6.14514in" svg:height="3.51875in" style:rel-width="scale" style:rel-height="scale"><draw:text-box><text:p text:style-name="P62"><draw:frame draw:style-name="a2" draw:name="Imagen 7" text:anchor-type="as-char" svg:x="0in" svg:y="0in" svg:width="4.13335in" svg:height="3.10001in" style:rel-width="scale" style:rel-height="scale"><draw:image xlink:href="media/image2.jpeg" xlink:type="simple" xlink:show="embed" xlink:actuate="onLoad"/><svg:title/><svg:desc>Un dibujo de una persona

Descripción generada automáticamente con confianza baja</svg:desc></draw:frame></text:p><text:p text:style-name="P63">Figura 1.- Imagen de microscopio.</text:p></draw:text-box><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64"><text:span text:style-name="T65"><draw:frame draw:z-index="251660288" draw:id="id1" draw:style-name="a3" draw:name="Frame3" text:anchor-type="paragraph" svg:x="0in" svg:y="0.71667in" svg:width="6.14514in" svg:height="4.05625in" style:rel-width="scale" style:rel-height="scale"><draw:text-box><text:p text:style-name="P66"/><text:p text:style-name="P67"><text:span text:style-name="T68"><draw:frame draw:style-name="a4" draw:name="Imagen 12" text:anchor-type="as-char" svg:x="0in" svg:y="0in" svg:width="4.11811in" svg:height="3.15248in" style:rel-width="scale" style:rel-height="scale"><draw:image xlink:href="media/image3.png" xlink:type="simple" xlink:show="embed" xlink:actuate="onLoad"/><svg:title/><svg:desc>Imagen que contiene Gráfico

Descripción generada automáticamente</svg:desc></draw:frame></text:span></text:p><text:p text:style-name="P69">Figura 1.- Imagen procesada para la detección de células.</text:p></draw:text-box><svg:title/><svg:desc/></draw:frame></text:span>Tras realizar la detección de células, la aplicación devolverá la imagen procesada con la posición de cada una de las células a partir de la utilización de<text:s/><text:span text:style-name="T70">bounding boxes.<text:s/></text:span>Un ejemplo de ello se muestra en la Figura 2. Además, proporcionará el número total de células encontrada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71">Para un mayor entendimiento, en la Figura 3, se muestra un diagrama de casos de uso que permite visualizar los diferentes tipos de roles del sistema y cómo esos roles interactúan con el sistema:</text:p>
      <text:p text:style-name="Textbody"><text:span text:style-name="T72"><draw:frame draw:z-index="251662336" draw:id="id2" draw:style-name="a5" draw:name="Frame3" text:anchor-type="paragraph" svg:x="0in" svg:y="0.00556in" svg:width="5.02778in" svg:height="3.9375in" style:rel-width="scale" style:rel-height="scale"><draw:text-box><text:p text:style-name="P73"/><text:p text:style-name="P74"><draw:frame draw:style-name="a6" draw:name="Imagen 13" text:anchor-type="as-char" svg:x="0in" svg:y="0in" svg:width="5.05627in" svg:height="3.1303in" style:rel-width="scale" style:rel-height="scale"><draw:image xlink:href="media/image4.png" xlink:type="simple" xlink:show="embed" xlink:actuate="onLoad"/><svg:title/><svg:desc>Diagrama

Descripción generada automáticamente</svg:desc></draw:frame></text:p><text:p text:style-name="P75">Figura 3.- Diagrama de casos de uso del sistema.</text:p></draw:text-box><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2" text:outline-level="2"><text:bookmark-start text:name="__RefHeading___Toc434_3441010062"/>Características del usuario<text:bookmark-end text:name="__RefHeading___Toc434_3441010062"/></text:h>
      <text:p text:style-name="Textbody">El usuario principalmente será el cliente, aunque de forma general se pueden definir las características del perfil al que iría indicado el uso de la aplicación a desarrollar:<text:s/></text:p>
      <table:table table:style-name="Table76">
        <table:table-columns>
          <table:table-column table:style-name="TableColumn77"/>
          <table:table-column table:style-name="TableColumn78"/>
        </table:table-columns>
        <table:table-row table:style-name="TableRow79">
          <table:table-cell table:style-name="TableCell80" table:number-columns-spanned="2">
            <text:p text:style-name="P81">Perfil de usuario</text:p>
          </table:table-cell>
          <table:covered-table-cell/>
        </table:table-row>
        <table:table-row table:style-name="TableRow82">
          <table:table-cell table:style-name="TableCell83">
            <text:p text:style-name="P84">Edad</text:p>
          </table:table-cell>
          <table:table-cell table:style-name="TableCell85">
            <text:p text:style-name="P86">20 – 65 años (Media: 47 años) <text:s/></text:p>
          </table:table-cell>
        </table:table-row>
        <table:table-row table:style-name="TableRow87">
          <table:table-cell table:style-name="TableCell88">
            <text:p text:style-name="P89">Género</text:p>
          </table:table-cell>
          <table:table-cell table:style-name="TableCell90">
            <text:p text:style-name="P91">Indiferente</text:p>
          </table:table-cell>
        </table:table-row>
        <table:table-row table:style-name="TableRow92">
          <table:table-cell table:style-name="TableCell93">
            <text:p text:style-name="P94">Tipo de trabajo</text:p>
          </table:table-cell>
          <table:table-cell table:style-name="TableCell95">
            <text:p text:style-name="P96">Investigador/a, profesor/a, biólogo/a, ingeniero/a bioquímica, técnico/a de laboratorio y similares</text:p>
          </table:table-cell>
        </table:table-row>
        <table:table-row table:style-name="TableRow97">
          <table:table-cell table:style-name="TableCell98">
            <text:p text:style-name="P99">Nivel de experiencia</text:p>
          </table:table-cell>
          <table:table-cell table:style-name="TableCell100">
            <text:p text:style-name="P101">0 – 10 años</text:p>
          </table:table-cell>
        </table:table-row>
        <table:table-row table:style-name="TableRow102">
          <table:table-cell table:style-name="TableCell103">
            <text:p text:style-name="P104">Eduación</text:p>
          </table:table-cell>
          <table:table-cell table:style-name="TableCell105">
            <text:p text:style-name="P106">Típicamente un grado universitario o un grado medio</text:p>
          </table:table-cell>
        </table:table-row>
        <table:table-row table:style-name="TableRow107">
          <table:table-cell table:style-name="TableCell108">
            <text:p text:style-name="P109">Ubicación</text:p>
          </table:table-cell>
          <table:table-cell table:style-name="TableCell110">
            <text:p text:style-name="P111">España</text:p>
          </table:table-cell>
        </table:table-row>
        <table:table-row table:style-name="TableRow112">
          <table:table-cell table:style-name="TableCell113">
            <text:p text:style-name="P114">Tecnología</text:p>
          </table:table-cell>
          <table:table-cell table:style-name="TableCell115">
            <text:p text:style-name="P116">Experiencia con el ordenador y manejo de servidores web<text:s/></text:p>
          </table:table-cell>
        </table:table-row>
        <table:table-row table:style-name="TableRow117">
          <table:table-cell table:style-name="TableCell118">
            <text:p text:style-name="P119">Discapacidades</text:p>
          </table:table-cell>
          <table:table-cell table:style-name="TableCell120">
            <text:p text:style-name="P121">Sin limitaciones específicas</text:p>
          </table:table-cell>
        </table:table-row>
        <table:table-row table:style-name="TableRow122">
          <table:table-cell table:style-name="TableCell123">
            <text:p text:style-name="P124">Familia</text:p>
          </table:table-cell>
          <table:table-cell table:style-name="TableCell125">
            <text:p text:style-name="P126">Sin especificar</text:p>
          </table:table-cell>
        </table:table-row>
      </table:table>
      <text:p text:style-name="P127"/>
      <text:h text:style-name="Título2" text:outline-level="2"><text:bookmark-start text:name="__RefHeading___Toc436_3441010062"/>Restricciones generales<text:bookmark-end text:name="__RefHeading___Toc436_3441010062"/></text:h>
      <text:p text:style-name="P128">En esta sección se especifican de forma general los requisitos no funcionales:</text:p>
      <text:list text:style-name="LFO10" text:continue-numbering="true">
        <text:list-item>
          <text:p text:style-name="P129">Lenguaje de programación. El lenguaje para la programación de la aplicación será Python, debido a su facilidad de uso y las bibliotecas disponibles para crear la interfaz y funcionalidad del sistema.</text:p>
        </text:list-item>
        <text:list-item>
          <text:p text:style-name="P130">Limitaciones del hardware. Se utilizará un ordenador con procesador i7.</text:p>
        </text:list-item>
        <text:list-item>
          <text:p text:style-name="P131">Limitaciones de programación. Se empleará un servidor proporcionado por el cliente para el entrenamiento del algoritmo de detección de células.<text:s/></text:p>
        </text:list-item>
        <text:list-item>
          <text:p text:style-name="P132">Protocolos de comunicación. El envío de datos se realizara mediante el uso de funciones de Python.</text:p>
        </text:list-item>
        <text:list-item>
          <text:p text:style-name="P133">Criticidad de la aplicación. Podrían quedar células sin detectar que podrían ser sumadas manualmente por el humano.<text:s/></text:p>
        </text:list-item>
        <text:list-item>
          <text:p text:style-name="P134">Seguridad lógica y gestión de la información. El sistema únicamente puede ser modificado por los desarrolladores y seguirá las recomendaciones de programación que incrementen la seguridad de los datos.<text:s/></text:p>
        </text:list-item>
        <text:list-item>
          <text:p text:style-name="P135">Usabilidad. El tiempo de aprendizaje del sistema por el usuario debe ser menor de 2 horas. La interfaz debe ser coherente y ordenada, pudiendo ser utiliza por personas sin formación tecnológica concreta.<text:s/></text:p>
        </text:list-item>
        <text:list-item>
          <text:p text:style-name="P136">Condiciones ambientales. No son especificadas debido a que el sistema se encuentra en la nube y será accesible desde el ordenador.<text:s/></text:p>
        </text:list-item>
      </text:list>
      <text:p text:style-name="P137"/>
      <text:h text:style-name="Título2" text:outline-level="2"><text:bookmark-start text:name="__RefHeading___Toc438_3441010062"/>Suposiciones y dependencias<text:bookmark-end text:name="__RefHeading___Toc438_3441010062"/></text:h>
      <text:list text:style-name="LFO11" text:continue-numbering="true">
        <text:list-item>
          <text:p text:style-name="P138">Para el desarrollo del entrenamiento se utilizarán 274 imágenes. Para validación será utilizado otro conjunto de 69 imágenes. Ambos conjuntos tienen anotaciones de la posición de las células. <text:s text:c="2"/></text:p>
        </text:list-item>
        <text:list-item>
          <text:p text:style-name="P139">Las imágenes digitalizadas deberán tener una resolución suficiente para que las células puedan ser detectadas. Deberían poder ser identificadas por un experto humano sin problema.<text:s/></text:p>
        </text:list-item>
        <text:list-item>
          <text:p text:style-name="P140">La aplicación será desarrollada utilizando una versión 3.7 o superior de Python y OpenCV.<text:s/></text:p>
        </text:list-item>
        <text:list-item>
          <text:p text:style-name="P141">La interfaz se implementará utilizando la librería de Python Tkinker.<text:s/></text:p>
        </text:list-item>
        <text:list-item>
          <text:p text:style-name="P142">La aplicación final podrá ser ejecutada en versiones superiores a Windows 7.<text:s/></text:p>
        </text:list-item>
        <text:list-item>
          <text:p text:style-name="P143">Se utilizará GitHub para la gestión de versiones y como apoyo al desarrollo cooperativo del sistema.<text:s/></text:p>
        </text:list-item>
      </text:list>
      <text:h text:style-name="Título1" text:outline-level="1"><text:bookmark-start text:name="__RefHeading___Toc440_3441010062"/><text:soft-page-break/>Requisitos específicos<text:bookmark-end text:name="__RefHeading___Toc440_3441010062"/></text:h>
      <text:p text:style-name="P144">En esta sección, se definen los requisitos específicos de forma detallada, aportando la información necesaria sobre los requerimientos de diseño para los desarrolladores. De esta manera, se especifican los requisitos a cumplir con el fin de crear el sistema esperado y poder planificar y probar las funcionalidades del mismo con los test planteados.<text:s/></text:p>
      <text:h text:style-name="Título2" text:outline-level="2"><text:bookmark-start text:name="__RefHeading___Toc499_113882510"/>Funciones<text:bookmark-end text:name="__RefHeading___Toc499_113882510"/></text:h>
      <text:p text:style-name="P145">En la siguiente enumeración, se han detallado los requisitos funcionales esperados:</text:p>
      <text:list text:style-name="LFO12" text:continue-numbering="true">
        <text:list-item>
          <text:p text:style-name="P146"><text:span text:style-name="T147">Detectar y conteo de células.</text:span></text:p>
        </text:list-item>
      </text:list>
      <text:p text:style-name="P148"><text:span text:style-name="T149">Origen:</text:span><text:s/>Este requisito se origina de la necesidad planteada por el cliente para detectar todas las células presentes en la imagen obtenida por microscopía.<text:s/></text:p>
      <text:p text:style-name="P150"><text:span text:style-name="T151">Descripción</text:span>: Para abordarlo, se debe entrenar una red neuronal capaz de reconocer y situar la posición de las células encontradas mediante un recuadro. Por tanto, se debe implementar un sistema de reconocimiento de células mediante aprendizaje automático capaz de devolver las del rectángulo que engloba la detección de cada célula en una imagen. Para este objetivo, se deben tener en cuenta las siguientes consideraciones:<text:s/></text:p>
      <text:list text:style-name="LFO13" text:continue-numbering="true">
        <text:list-item>
          <text:list>
            <text:list-item>
              <text:p text:style-name="P152">Se deberán utilizan un 80% de las imágenes proporcionadas por el cliente para el entrenamiento y el 20% para la validación.<text:s/></text:p>
            </text:list-item>
            <text:list-item>
              <text:p text:style-name="P153">Se deberán probar distintos modelos de aprendizaje automático adecuados para la tarea. Estos modelos serán validados siguiendo las métricas de IoU y será elegido aquel que proporcione una mayor precisión.<text:s/></text:p>
            </text:list-item>
            <text:list-item>
              <text:p text:style-name="P154">Asimismo, el modelo será validado según el número total de células encontrado comparado con el esperado.<text:s/></text:p>
            </text:list-item>
            <text:list-item>
              <text:p text:style-name="P155">Una vez entrenado el modelo, este podrá ser utilizado para detectar la detección de células en una imagen concreta proporcionada.</text:p>
            </text:list-item>
            <text:list-item>
              <text:p text:style-name="P156">Las imágenes que se le pasen deberán estar en color.</text:p>
            </text:list-item>
            <text:list-item>
              <text:p text:style-name="P157">Las células pueden encontrarse en cualquier orientación y posición de la imagen y deberá ofrecer la detección de cada una de ellas.<text:s/></text:p>
            </text:list-item>
            <text:list-item>
              <text:p text:style-name="P158">La detección consistirá en la definición de zonas rectangulares que envuelvan cada una de las células encontradas. Estas definen la posición de la célula, su orientación y la confianza de la detección.<text:s/></text:p>
            </text:list-item>
            <text:list-item>
              <text:p text:style-name="P159">El total de células se obtiene de la cantidad de zonas rectangulares que definen cada célula.<text:s/></text:p>
            </text:list-item>
            <text:list-item>
              <text:p text:style-name="P160">En las imágenes puede haber tipos de células diferentes pero deben contarse las detecciones totales.</text:p>
            </text:list-item>
          </text:list>
        </text:list-item>
      </text:list>
      <text:p text:style-name="P161"><text:span text:style-name="T162">Forma de probarlo:</text:span><text:s/>Para desarrollarlo y testearlo se usarán imágenes de células obtenidas por microscopía proporcionadas por el cliente (ver ejemplo en Figura 1). Se tienen información en documentos XML sobre la posición de cada una mediante la definición de zonas<text:s/><text:soft-page-break/>rectangulares, pudiendo obtener también el total de células en cada imagen. El total de imágenes que proporcionadas con anotaciones son 343.<text:s/></text:p>
      <text:p text:style-name="P163"><text:span text:style-name="T164"><draw:frame draw:id="id3" draw:style-name="a7" draw:name="Frame6" text:anchor-type="as-char" svg:x="0in" svg:y="0in" svg:width="3.91806in" svg:height="1.36875in" style:rel-width="scale" style:rel-height="scale"><draw:text-box><text:p text:style-name="P165"><text:span text:style-name="T166"><draw:frame draw:style-name="a8" draw:name="Picture 1" text:anchor-type="as-char" svg:x="0in" svg:y="0in" svg:width="3.51667in" svg:height="2.64167in" style:rel-width="scale" style:rel-height="scale"><draw:image xlink:href="media/image5.jpeg" xlink:type="simple" xlink:show="embed" xlink:actuate="onLoad"/><svg:title/><svg:desc>C:\Users\Usuario\AppData\Local\Microsoft\Windows\INetCache\Content.Word\BloodImage_00035.jpg</svg:desc></draw:frame></text:span></text:p><text:p text:style-name="P167">Figura 1.- Ejemplo de imagen de células obtenida por microscopía.</text:p></draw:text-box><svg:title/><svg:desc/></draw:frame></text:span></text:p>
      <text:list text:style-name="LFO12" text:continue-numbering="true">
        <text:list-item>
          <text:p text:style-name="P168"><text:span text:style-name="T169">Dibujo de la posición de las células detectadas.</text:span></text:p>
        </text:list-item>
      </text:list>
      <text:p text:style-name="P170"><text:span text:style-name="T171">Origen:</text:span><text:s/>El cliente desea visualizar la posición de las células detectadas por la red neuronal.<text:s/></text:p>
      <text:p text:style-name="P172"><text:span text:style-name="T173">Descripción:<text:s/></text:span>Se debe desarrollar una función mediante OpenCV que permita dibujar la información obtenida por la red neuronal. Para ello, debe ser capaz de dibujar las zonas rectangulares devueltas. Esta función tendrá las siguientes características:</text:p>
      <text:list text:style-name="LFO14" text:continue-numbering="true">
        <text:list-item>
          <text:list>
            <text:list-item>
              <text:p text:style-name="P174">Recibirá la imagen introducida inicialmente por el usuario y el array de zonas rectangulares para la imagen obtenida en la predicción de la red neuronal.<text:s/></text:p>
            </text:list-item>
            <text:list-item>
              <text:p text:style-name="P175">Las imágenes que se le pasen estarán a color y el<text:s/><text:span text:style-name="T176">array</text:span><text:s/>será del tipo<text:s/><text:span text:style-name="T177">np.array</text:span><text:s/>de la librería Numpy.</text:p>
            </text:list-item>
            <text:list-item>
              <text:p text:style-name="P178">La función devolverá una imagen con rectángulos de color verde que envolverán cada célula detectada.<text:s/></text:p>
            </text:list-item>
            <text:list-item>
              <text:p text:style-name="P179">Habrá tantos rectángulos como cantidad de células detectadas.<text:s/></text:p>
            </text:list-item>
          </text:list>
        </text:list-item>
      </text:list>
      <text:p text:style-name="P180"><text:span text:style-name="T181">Forma de probarlo:</text:span><text:s/>Se utilizarán las imágenes proporcionadas por el cliente y la información XML para comparar los rectángulos proporcionados con los obtenidos. El dibujo de la detección de las células será mostrado en la interfaz.<text:s/></text:p>
      <text:list text:style-name="LFO12" text:continue-numbering="true">
        <text:list-item>
          <text:p text:style-name="P182"><text:span text:style-name="T183">Interfaz.</text:span></text:p>
        </text:list-item>
      </text:list>
      <text:p text:style-name="P184"><text:span text:style-name="T185">Origen:</text:span><text:s/>Este requisito se basa en la necesidad del cliente para poder utilizar el sistema de forma sencilla. Para ello, se precisa del desarrollo de una aplicación fácil de usar para poder cargar una imagen y obtener de forma automática el número total de células y la visualización de la detección de cada una de ellas.<text:s/></text:p>
      <text:p text:style-name="P186"><text:span text:style-name="T187">Descripción:</text:span><text:s/>Se desarrollará una interfaz mediante la librería Tkinker de Python que permita mostrar en una ventana las funcionalidades necesarias de la aplicación. Esta interfaz consta de las siguientes características:</text:p>
      <text:soft-page-break/>
      <text:list text:style-name="LFO15" text:continue-numbering="true">
        <text:list-item>
          <text:list>
            <text:list-item>
              <text:p text:style-name="P188">En la interfaz se pulsará un botón para poder cargar la imagen a procesar seleccionando la ruta deseada.<text:s/></text:p>
            </text:list-item>
            <text:list-item>
              <text:p text:style-name="P189">Una vez cargada la ruta de la imagen, está será cargada y mostrada en un cuadrado de la ventana.<text:s/></text:p>
            </text:list-item>
            <text:list-item>
              <text:p text:style-name="P190">Se pulsará un botón para comenzar el procesamiento y detectar las células en la imagen mostrada.<text:s/></text:p>
            </text:list-item>
            <text:list-item>
              <text:p text:style-name="P191">La imagen mostrada se actualizará añadiendo los rectángulos que definen la detección de cada célula obtenida por el modelo.<text:s/></text:p>
            </text:list-item>
            <text:list-item>
              <text:p text:style-name="P192">Una vez hecho el reconocimiento, también será mostrado el número total de células detectadas además del tiempo de ejecución empleado.<text:s/></text:p>
            </text:list-item>
          </text:list>
        </text:list-item>
      </text:list>
      <text:p text:style-name="P193"><text:span text:style-name="T194">Forma de probarlo:</text:span><text:s/>Para probarlo, se realizarán las pruebas necesarias con las imágenes de validación para poder observar el funcionamiento correcto de cada una de las funcionalidades de la interfaz.<text:s/></text:p>
      <text:h text:style-name="Título2" text:outline-level="2"><text:bookmark-start text:name="__RefHeading___Toc501_113882510"/>Rendimiento<text:bookmark-end text:name="__RefHeading___Toc501_113882510"/></text:h>
      <text:p text:style-name="P195">El sistema de detección y conteo de células en la imagen deberá ejecutarse en menos de 5 segundos por cada imagen en un ordenador estándar, con un modelo mínimo de i5. El sistema deberá ser capaz de tratar como mínimo 30 imágenes por día. <text:s/></text:p>
      <text:p text:style-name="P196">La tasa de acierto deberá ser similar a la obtenida por un humano, no aceptando un error mayor del 5%.</text:p>
      <text:h text:style-name="Título2" text:outline-level="2"><text:bookmark-start text:name="__RefHeading___Toc503_113882510"/>Restricciones de diseño<text:bookmark-end text:name="__RefHeading___Toc503_113882510"/></text:h>
      <text:list text:style-name="LFO16" text:continue-numbering="true">
        <text:list-item>
          <text:p text:style-name="P197">El sistema no será capaz de reconocer aquellas células que se encuentren solapadas en más de un 50% por otra célula adyacente. En ese caso, puede ser que el sistema detecte ambas células como una única.</text:p>
        </text:list-item>
        <text:list-item>
          <text:p text:style-name="P198">Las células con un tamaño más grandes o más pequeñas de lo normal es posible que no puedan ser detectadas automáticamente.<text:s/></text:p>
        </text:list-item>
        <text:list-item>
          <text:p text:style-name="P199">Las imágenes a procesar deberán ser similares a las proporcionadas por el cliente para el desarrollo de la aplicación. El uso de imágenes con células de otro tipo o en una calidad diferente no podrán ser procesadas dentreo de las especificaciones de rendimiento.<text:s/></text:p>
        </text:list-item>
        <text:list-item>
          <text:p text:style-name="P200">Las imágenes deben ser en color y en formato JPG.<text:s/></text:p>
        </text:list-item>
      </text:list>
      <text:h text:style-name="Título2" text:outline-level="2"><text:bookmark-start text:name="__RefHeading___Toc505_113882510"/>Atributos del sistema<text:bookmark-end text:name="__RefHeading___Toc505_113882510"/></text:h>
      <text:list text:style-name="LFO17" text:continue-numbering="true">
        <text:list-item>
          <text:p text:style-name="P201">Portabilidad.- El desarrollo sobre Python asegurará su portabilidad a sistemas MAC/Windows/Linux.</text:p>
        </text:list-item>
        <text:list-item>
          <text:p text:style-name="P202">Mantenibilidad.- El código desarrollado cumplirá las normas de estilo de la empresa (nomenclatura de variables y funciones, tamaño de las funciones, comentarios…).</text:p>
        </text:list-item>
        <text:list-item>
          <text:p text:style-name="P203">Se va a usar Programación Orientada a Objetos como en otras bibliotecas desarrolladas por Visionarea.</text:p>
        </text:list-item>
        <text:list-item>
          <text:p text:style-name="P204">Todas las clases, funciones y métodos desarrollados estarán acompañadas de un comentario de documentación.</text:p>
        </text:list-item>
        <text:list-item>
          <text:p text:style-name="P205">Se suministrará documentación con ejemplos de cómo usar la biblitoeca para detectar y reconocer los diferentes tipos de documentos.</text:p>
        </text:list-item>
        <text:list-item>
          <text:p text:style-name="P206">El sistema estaŕa acompañado de test unitarios que comproboran las diferentes funciones del sistema con un 100% de cobertura.</text:p>
        </text:list-item>
      </text:list>
      <text:h text:style-name="Título2" text:outline-level="2">Otros requisitos</text:h>
      <text:p text:style-name="P207">Existe la necesidad de formación de los desarrolladores en los diferentes tipos de códigos de barras descrito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3</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vid Gomez</meta:initial-creator>
    <dc:creator>david</dc:creator>
    <meta:creation-date>2023-03-09T11:46:00Z</meta:creation-date>
    <dc:date>2023-03-13T13:10:00Z</dc:date>
    <meta:template xlink:href="Normal" xlink:type="simple"/>
    <meta:editing-cycles>9</meta:editing-cycles>
    <meta:editing-duration>PT17700S</meta:editing-duration>
    <meta:document-statistic meta:page-count="11" meta:paragraph-count="34" meta:word-count="2637" meta:character-count="17112" meta:row-count="120" meta:non-whitespace-character-count="14509"/>
  </office:meta>
</office:document-meta>
</file>